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top="0cm" fo:margin-bottom="0.247cm" style:contextual-spacing="false" fo:line-height="115%"/>
    </style:style>
    <style:style style:name="P2" style:family="paragraph" style:parent-style-name="Horizontal_20_Line">
      <style:paragraph-properties fo:margin-top="0cm" fo:margin-bottom="0.247cm" style:contextual-spacing="false" fo:line-height="115%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15%" fo:text-indent="0cm" style:auto-text-indent="false" fo:background-color="transparent"/>
    </style:style>
    <style:style style:name="P7" style:family="paragraph" style:parent-style-name="Preformatted_20_Text">
      <loext:graphic-properties draw:fill="none" draw:fill-color="#ffffff"/>
      <style:paragraph-properties fo:margin-top="0cm" fo:margin-bottom="0.247cm" style:contextual-spacing="false" fo:line-height="115%" fo:background-color="transparent"/>
    </style:style>
    <style:style style:name="P8" style:family="paragraph" style:parent-style-name="Heading_20_1">
      <style:paragraph-properties fo:margin-top="0cm" fo:margin-bottom="0.247cm" style:contextual-spacing="false" fo:line-height="115%"/>
    </style:style>
    <style:style style:name="P9" style:family="paragraph" style:parent-style-name="Heading_20_2">
      <style:paragraph-properties fo:margin-top="0cm" fo:margin-bottom="0.247cm" style:contextual-spacing="false" fo:line-height="115%"/>
    </style:style>
    <style:style style:name="P10" style:family="paragraph" style:parent-style-name="Preformatted_20_Text">
      <style:paragraph-properties fo:margin-top="0cm" fo:margin-bottom="0.247cm" style:contextual-spacing="false" fo:line-height="115%"/>
    </style:style>
    <style:style style:name="T1" style:family="text">
      <style:text-properties fo:color="#6e7687" loext:opacity="100%" fo:font-family="'var font-mono'" fo:background-color="transparent" loext:char-shading-value="0"/>
    </style:style>
    <style:style style:name="T2" style:family="text">
      <style:text-properties fo:color="#8100c2" loext:opacity="100%" fo:font-family="'var font-mono'" fo:background-color="transparent" loext:char-shading-value="0"/>
    </style:style>
    <style:style style:name="T3" style:family="text">
      <style:text-properties fo:color="#14181f" loext:opacity="100%" fo:font-family="'var font-mono'" fo:background-color="transparent" loext:char-shading-value="0"/>
    </style:style>
    <style:style style:name="T4" style:family="text">
      <style:text-properties fo:color="#0051c2" loext:opacity="100%" fo:font-family="'var font-mono'" fo:background-color="transparent" loext:char-shading-value="0"/>
    </style:style>
    <style:style style:name="T5" style:family="text">
      <style:text-properties fo:color="#2b303b" loext:opacity="100%" fo:font-family="'var font-mono'" fo:background-color="transparent" loext:char-shading-value="0"/>
    </style:style>
    <style:style style:name="T6" style:family="text">
      <style:text-properties fo:color="#14181f" loext:opacity="100%" fo:background-color="transparent" loext:char-shading-value="0"/>
    </style:style>
    <style:style style:name="T7" style:family="text">
      <style:text-properties fo:color="#008000" loext:opacity="100%" fo:font-family="'var font-mono'" fo:background-color="transparent" loext:char-shading-value="0"/>
    </style:style>
    <style:style style:name="T8" style:family="text">
      <style:text-properties fo:color="#008080" loext:opacity="100%" fo:font-family="'var font-mono'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ula — Semana 3, Quarta-feira</text:h>
      <text:h text:style-name="P1" text:outline-level="3">GROUP BY e Funções de Agregação</text:h>
      <text:p text:style-name="P2"/>
      <text:h text:style-name="P1" text:outline-level="3">1. Uma mudança de paradigma</text:h>
      <text:p text:style-name="Text_20_body">Tudo que você aprendeu até aqui — <text:span text:style-name="Source_20_Text">SELECT</text:span>, <text:span text:style-name="Source_20_Text">WHERE</text:span>, <text:span text:style-name="Source_20_Text">ORDER BY</text:span> — opera sobre <text:span text:style-name="Strong_20_Emphasis">linhas individuais</text:span>. Você seleciona colunas de uma linha, filtra linhas por condição, ordena linhas por valor. A unidade de trabalho é sempre a linha.</text:p>
      <text:p text:style-name="Text_20_body"><text:span text:style-name="Source_20_Text">GROUP BY</text:span> muda isso fundamentalmente. Ele transforma linhas individuais em <text:span text:style-name="Strong_20_Emphasis">grupos</text:span>, e sobre esses grupos você aplica <text:span text:style-name="Strong_20_Emphasis">funções de agregação</text:span> que calculam um valor único para o grupo inteiro. A unidade de trabalho deixa de ser a linha e passa a ser o conjunto.</text:p>
      <text:p text:style-name="Text_20_body">Pense na diferença entre estas duas perguntas:</text:p>
      <text:list text:style-name="L1">
        <text:list-item>
          <text:p text:style-name="P3">"Qual é o preço do produto X?" → pergunta sobre uma linha individual </text:p>
        </text:list-item>
        <text:list-item>
          <text:p text:style-name="P4">"Qual é o preço médio de todos os produtos?" → pergunta sobre um conjunto </text:p>
        </text:list-item>
      </text:list>
      <text:p text:style-name="Text_20_body">A segunda pergunta não tem resposta em nenhuma linha específica — a resposta emerge do conjunto inteiro. É para isso que existem agregação e <text:span text:style-name="Source_20_Text">GROUP BY</text:span>.</text:p>
      <text:p text:style-name="P2"/>
      <text:h text:style-name="P1" text:outline-level="3">2. As funções de agregação</text:h>
      <text:p text:style-name="Text_20_body">Antes de entender o <text:span text:style-name="Source_20_Text">GROUP BY</text:span>, você precisa conhecer as funções que operam sobre grupos.</text:p>
      <text:p text:style-name="Text_20_body"><text:span text:style-name="Strong_20_Emphasis"><text:span text:style-name="Source_20_Text">COUNT</text:span></text:span> conta o número de linhas ou valores não nulos.</text:p>
      <text:p text:style-name="P5">sql</text:p>
      <text:p text:style-name="P6"><text:span text:style-name="Source_20_Text"><text:span text:style-name="T1">-- Conta todas as linhas da tabela</text:span></text:span></text:p>
      <text:p text:style-name="P6"><text:span text:style-name="Source_20_Text"><text:span text:style-name="T2">SELECT</text:span></text:span><text:span text:style-name="Source_20_Text"><text:span text:style-name="T3"> </text:span></text:span><text:span text:style-name="Source_20_Text"><text:span text:style-name="T4">COUNT</text:span></text:span><text:span text:style-name="Source_20_Text"><text:span text:style-name="T5">(</text:span></text:span><text:span text:style-name="Source_20_Text"><text:span text:style-name="T3">*</text:span></text:span><text:span text:style-name="Source_20_Text"><text:span text:style-name="T5">)</text:span></text:span><text:span text:style-name="Source_20_Text"><text:span text:style-name="T3"> </text:span></text:span><text:span text:style-name="Source_20_Text"><text:span text:style-name="T2">FROM</text:span></text:span><text:span text:style-name="Source_20_Text"><text:span text:style-name="T3"> produtos</text:span></text:span><text:span text:style-name="Source_20_Text"><text:span text:style-name="T5">;</text:span></text:span></text:p>
      <text:p text:style-name="P7"/>
      <text:p text:style-name="P6"><text:span text:style-name="Source_20_Text"><text:span text:style-name="T1">-- Conta apenas linhas onde estoque não é nulo</text:span></text:span></text:p>
      <text:p text:style-name="P6"><text:span text:style-name="Source_20_Text"><text:span text:style-name="T2">SELECT</text:span></text:span><text:span text:style-name="Source_20_Text"><text:span text:style-name="T3"> </text:span></text:span><text:span text:style-name="Source_20_Text"><text:span text:style-name="T4">COUNT</text:span></text:span><text:span text:style-name="Source_20_Text"><text:span text:style-name="T5">(</text:span></text:span><text:span text:style-name="Source_20_Text"><text:span text:style-name="T3">estoque</text:span></text:span><text:span text:style-name="Source_20_Text"><text:span text:style-name="T5">)</text:span></text:span><text:span text:style-name="Source_20_Text"><text:span text:style-name="T3"> </text:span></text:span><text:span text:style-name="Source_20_Text"><text:span text:style-name="T2">FROM</text:span></text:span><text:span text:style-name="Source_20_Text"><text:span text:style-name="T3"> produtos</text:span></text:span><text:span text:style-name="Source_20_Text"><text:span text:style-name="T5">;</text:span></text:span></text:p>
      <text:p text:style-name="Text_20_body">A diferença entre <text:span text:style-name="Source_20_Text">COUNT(*)</text:span> e <text:span text:style-name="Source_20_Text">COUNT(coluna)</text:span> é sutil mas importante. <text:span text:style-name="Source_20_Text">COUNT(*)</text:span> conta todas as linhas, incluindo as que têm nulos. <text:span text:style-name="Source_20_Text">COUNT(coluna)</text:span> conta apenas as linhas onde aquela coluna não é nula. Em colunas <text:span text:style-name="Source_20_Text">NOT NULL</text:span> o resultado é o mesmo. Em colunas que aceitam nulo, pode ser diferente.</text:p>
      <text:p text:style-name="Text_20_body"><text:span text:style-name="Strong_20_Emphasis"><text:span text:style-name="Source_20_Text">SUM</text:span></text:span> soma os valores de uma coluna numérica:</text:p>
      <text:p text:style-name="P5">sql</text:p>
      <text:p text:style-name="P6"><text:span text:style-name="Source_20_Text"><text:span text:style-name="T1">-- Valor total do estoque</text:span></text:span></text:p>
      <text:p text:style-name="P6"><text:span text:style-name="Source_20_Text"><text:span text:style-name="T2">SELECT</text:span></text:span><text:span text:style-name="Source_20_Text"><text:span text:style-name="T3"> </text:span></text:span><text:span text:style-name="Source_20_Text"><text:span text:style-name="T4">SUM</text:span></text:span><text:span text:style-name="Source_20_Text"><text:span text:style-name="T5">(</text:span></text:span><text:span text:style-name="Source_20_Text"><text:span text:style-name="T3">preco * estoque</text:span></text:span><text:span text:style-name="Source_20_Text"><text:span text:style-name="T5">)</text:span></text:span><text:span text:style-name="Source_20_Text"><text:span text:style-name="T3"> </text:span></text:span><text:span text:style-name="Source_20_Text"><text:span text:style-name="T2">FROM</text:span></text:span><text:span text:style-name="Source_20_Text"><text:span text:style-name="T3"> produtos</text:span></text:span><text:span text:style-name="Source_20_Text"><text:span text:style-name="T5">;</text:span></text:span></text:p>
      <text:p text:style-name="Text_20_body"><text:span text:style-name="Strong_20_Emphasis"><text:span text:style-name="Source_20_Text">AVG</text:span></text:span> calcula a média aritmética:</text:p>
      <text:p text:style-name="P5">sql</text:p>
      <text:p text:style-name="P6"><text:soft-page-break/><text:span text:style-name="Source_20_Text"><text:span text:style-name="T1">-- Preço médio dos produtos</text:span></text:span></text:p>
      <text:p text:style-name="P6"><text:span text:style-name="Source_20_Text"><text:span text:style-name="T2">SELECT</text:span></text:span><text:span text:style-name="Source_20_Text"><text:span text:style-name="T3"> </text:span></text:span><text:span text:style-name="Source_20_Text"><text:span text:style-name="T4">AVG</text:span></text:span><text:span text:style-name="Source_20_Text"><text:span text:style-name="T5">(</text:span></text:span><text:span text:style-name="Source_20_Text"><text:span text:style-name="T3">preco</text:span></text:span><text:span text:style-name="Source_20_Text"><text:span text:style-name="T5">)</text:span></text:span><text:span text:style-name="Source_20_Text"><text:span text:style-name="T3"> </text:span></text:span><text:span text:style-name="Source_20_Text"><text:span text:style-name="T2">FROM</text:span></text:span><text:span text:style-name="Source_20_Text"><text:span text:style-name="T3"> produtos</text:span></text:span><text:span text:style-name="Source_20_Text"><text:span text:style-name="T5">;</text:span></text:span></text:p>
      <text:p text:style-name="Text_20_body"><text:span text:style-name="Source_20_Text">AVG</text:span> ignora nulos no cálculo — não os trata como zero. Se cinco produtos têm preço e dois têm preço nulo, <text:span text:style-name="Source_20_Text">AVG</text:span> divide a soma pelos cinco, não pelos sete.</text:p>
      <text:p text:style-name="Text_20_body"><text:span text:style-name="Strong_20_Emphasis"><text:span text:style-name="Source_20_Text">MAX</text:span></text:span> e <text:span text:style-name="Strong_20_Emphasis"><text:span text:style-name="Source_20_Text">MIN</text:span></text:span> retornam o maior e o menor valor:</text:p>
      <text:p text:style-name="P5">sql</text:p>
      <text:p text:style-name="P6"><text:span text:style-name="Source_20_Text"><text:span text:style-name="T1">-- Produto mais caro e mais barato</text:span></text:span></text:p>
      <text:p text:style-name="P6"><text:span text:style-name="Source_20_Text"><text:span text:style-name="T2">SELECT</text:span></text:span><text:span text:style-name="Source_20_Text"><text:span text:style-name="T3"> </text:span></text:span><text:span text:style-name="Source_20_Text"><text:span text:style-name="T4">MAX</text:span></text:span><text:span text:style-name="Source_20_Text"><text:span text:style-name="T5">(</text:span></text:span><text:span text:style-name="Source_20_Text"><text:span text:style-name="T3">preco</text:span></text:span><text:span text:style-name="Source_20_Text"><text:span text:style-name="T5">),</text:span></text:span><text:span text:style-name="Source_20_Text"><text:span text:style-name="T3"> </text:span></text:span><text:span text:style-name="Source_20_Text"><text:span text:style-name="T4">MIN</text:span></text:span><text:span text:style-name="Source_20_Text"><text:span text:style-name="T5">(</text:span></text:span><text:span text:style-name="Source_20_Text"><text:span text:style-name="T3">preco</text:span></text:span><text:span text:style-name="Source_20_Text"><text:span text:style-name="T5">)</text:span></text:span><text:span text:style-name="Source_20_Text"><text:span text:style-name="T3"> </text:span></text:span><text:span text:style-name="Source_20_Text"><text:span text:style-name="T2">FROM</text:span></text:span><text:span text:style-name="Source_20_Text"><text:span text:style-name="T3"> produtos</text:span></text:span><text:span text:style-name="Source_20_Text"><text:span text:style-name="T5">;</text:span></text:span></text:p>
      <text:p text:style-name="P7"/>
      <text:p text:style-name="P6"><text:span text:style-name="Source_20_Text"><text:span text:style-name="T1">-- Pedido mais recente e mais antigo</text:span></text:span></text:p>
      <text:p text:style-name="P6"><text:span text:style-name="Source_20_Text"><text:span text:style-name="T2">SELECT</text:span></text:span><text:span text:style-name="Source_20_Text"><text:span text:style-name="T3"> </text:span></text:span><text:span text:style-name="Source_20_Text"><text:span text:style-name="T4">MAX</text:span></text:span><text:span text:style-name="Source_20_Text"><text:span text:style-name="T5">(</text:span></text:span><text:span text:style-name="Source_20_Text"><text:span text:style-name="T2">data</text:span></text:span><text:span text:style-name="Source_20_Text"><text:span text:style-name="T5">),</text:span></text:span><text:span text:style-name="Source_20_Text"><text:span text:style-name="T3"> </text:span></text:span><text:span text:style-name="Source_20_Text"><text:span text:style-name="T4">MIN</text:span></text:span><text:span text:style-name="Source_20_Text"><text:span text:style-name="T5">(</text:span></text:span><text:span text:style-name="Source_20_Text"><text:span text:style-name="T2">data</text:span></text:span><text:span text:style-name="Source_20_Text"><text:span text:style-name="T5">)</text:span></text:span><text:span text:style-name="Source_20_Text"><text:span text:style-name="T3"> </text:span></text:span><text:span text:style-name="Source_20_Text"><text:span text:style-name="T2">FROM</text:span></text:span><text:span text:style-name="Source_20_Text"><text:span text:style-name="T3"> pedidos</text:span></text:span><text:span text:style-name="Source_20_Text"><text:span text:style-name="T5">;</text:span></text:span></text:p>
      <text:p text:style-name="Text_20_body"><text:span text:style-name="Source_20_Text">MAX</text:span> e <text:span text:style-name="Source_20_Text">MIN</text:span> funcionam também com texto — retornam o último e o primeiro em ordem alfabética — e com datas — retornam a mais recente e a mais antiga.</text:p>
      <text:p text:style-name="P2"/>
      <text:h text:style-name="P1" text:outline-level="3">3. Agregação sem GROUP BY</text:h>
      <text:p text:style-name="Text_20_body">Você pode usar funções de agregação sem <text:span text:style-name="Source_20_Text">GROUP BY</text:span>. Nesse caso, a função opera sobre <text:span text:style-name="Strong_20_Emphasis">todas as linhas da tabela</text:span> e retorna uma única linha de resultado:</text:p>
      <text:p text:style-name="P5">sql</text:p>
      <text:p text:style-name="P6"><text:span text:style-name="Source_20_Text"><text:span text:style-name="T2">SELECT</text:span></text:span></text:p>
      <text:p text:style-name="P6"><text:span text:style-name="Source_20_Text"><text:span text:style-name="T6"><text:s text:c="4"/></text:span></text:span><text:span text:style-name="Source_20_Text"><text:span text:style-name="T4">COUNT</text:span></text:span><text:span text:style-name="Source_20_Text"><text:span text:style-name="T5">(</text:span></text:span><text:span text:style-name="Source_20_Text"><text:span text:style-name="T3">*</text:span></text:span><text:span text:style-name="Source_20_Text"><text:span text:style-name="T5">)</text:span></text:span><text:span text:style-name="Source_20_Text"><text:span text:style-name="T3"> <text:s text:c="7"/></text:span></text:span><text:span text:style-name="Source_20_Text"><text:span text:style-name="T2">AS</text:span></text:span><text:span text:style-name="Source_20_Text"><text:span text:style-name="T3"> total_produtos</text:span></text:span><text:span text:style-name="Source_20_Text"><text:span text:style-name="T5">,</text:span></text:span></text:p>
      <text:p text:style-name="P6"><text:span text:style-name="Source_20_Text"><text:span text:style-name="T6"><text:s text:c="4"/></text:span></text:span><text:span text:style-name="Source_20_Text"><text:span text:style-name="T4">AVG</text:span></text:span><text:span text:style-name="Source_20_Text"><text:span text:style-name="T5">(</text:span></text:span><text:span text:style-name="Source_20_Text"><text:span text:style-name="T3">preco</text:span></text:span><text:span text:style-name="Source_20_Text"><text:span text:style-name="T5">)</text:span></text:span><text:span text:style-name="Source_20_Text"><text:span text:style-name="T3"> <text:s text:c="5"/></text:span></text:span><text:span text:style-name="Source_20_Text"><text:span text:style-name="T2">AS</text:span></text:span><text:span text:style-name="Source_20_Text"><text:span text:style-name="T3"> preco_medio</text:span></text:span><text:span text:style-name="Source_20_Text"><text:span text:style-name="T5">,</text:span></text:span></text:p>
      <text:p text:style-name="P6"><text:span text:style-name="Source_20_Text"><text:span text:style-name="T6"><text:s text:c="4"/></text:span></text:span><text:span text:style-name="Source_20_Text"><text:span text:style-name="T4">MAX</text:span></text:span><text:span text:style-name="Source_20_Text"><text:span text:style-name="T5">(</text:span></text:span><text:span text:style-name="Source_20_Text"><text:span text:style-name="T3">preco</text:span></text:span><text:span text:style-name="Source_20_Text"><text:span text:style-name="T5">)</text:span></text:span><text:span text:style-name="Source_20_Text"><text:span text:style-name="T3"> <text:s text:c="5"/></text:span></text:span><text:span text:style-name="Source_20_Text"><text:span text:style-name="T2">AS</text:span></text:span><text:span text:style-name="Source_20_Text"><text:span text:style-name="T3"> produto_mais_caro</text:span></text:span><text:span text:style-name="Source_20_Text"><text:span text:style-name="T5">,</text:span></text:span></text:p>
      <text:p text:style-name="P6"><text:span text:style-name="Source_20_Text"><text:span text:style-name="T6"><text:s text:c="4"/></text:span></text:span><text:span text:style-name="Source_20_Text"><text:span text:style-name="T4">MIN</text:span></text:span><text:span text:style-name="Source_20_Text"><text:span text:style-name="T5">(</text:span></text:span><text:span text:style-name="Source_20_Text"><text:span text:style-name="T3">preco</text:span></text:span><text:span text:style-name="Source_20_Text"><text:span text:style-name="T5">)</text:span></text:span><text:span text:style-name="Source_20_Text"><text:span text:style-name="T3"> <text:s text:c="5"/></text:span></text:span><text:span text:style-name="Source_20_Text"><text:span text:style-name="T2">AS</text:span></text:span><text:span text:style-name="Source_20_Text"><text:span text:style-name="T3"> produto_mais_barato</text:span></text:span><text:span text:style-name="Source_20_Text"><text:span text:style-name="T5">,</text:span></text:span></text:p>
      <text:p text:style-name="P6"><text:span text:style-name="Source_20_Text"><text:span text:style-name="T6"><text:s text:c="4"/></text:span></text:span><text:span text:style-name="Source_20_Text"><text:span text:style-name="T4">SUM</text:span></text:span><text:span text:style-name="Source_20_Text"><text:span text:style-name="T5">(</text:span></text:span><text:span text:style-name="Source_20_Text"><text:span text:style-name="T3">estoque</text:span></text:span><text:span text:style-name="Source_20_Text"><text:span text:style-name="T5">)</text:span></text:span><text:span text:style-name="Source_20_Text"><text:span text:style-name="T3"> <text:s text:c="3"/></text:span></text:span><text:span text:style-name="Source_20_Text"><text:span text:style-name="T2">AS</text:span></text:span><text:span text:style-name="Source_20_Text"><text:span text:style-name="T3"> estoque_total</text:span></text:span></text:p>
      <text:p text:style-name="P6"><text:span text:style-name="Source_20_Text"><text:span text:style-name="T2">FROM</text:span></text:span><text:span text:style-name="Source_20_Text"><text:span text:style-name="T3"> produtos</text:span></text:span><text:span text:style-name="Source_20_Text"><text:span text:style-name="T5">;</text:span></text:span></text:p>
      <text:p text:style-name="P6"><text:span text:style-name="Source_20_Text"><text:span text:style-name="T3">total_produtos | preco_medio | produto_mais_caro | produto_mais_barato | estoque_total</text:span></text:span></text:p>
      <text:p text:style-name="P7"><text:span text:style-name="Source_20_Text"><text:span text:style-name="T3">---------------|-------------|-------------------|---------------------|---------------</text:span></text:span></text:p>
      <text:p text:style-name="P7"><text:span text:style-name="Source_20_Text"><text:span text:style-name="T3">5 <text:s text:c="13"/>| 151.00 <text:s text:c="5"/>| 320.00 <text:s text:c="11"/>| 30.00 <text:s text:c="14"/>| 385</text:span></text:span></text:p>
      <text:p text:style-name="Text_20_body">Isso é útil para consultas analíticas globais. O resultado é sempre <text:span text:style-name="Strong_20_Emphasis">uma única linha</text:span> — o resumo do conjunto inteiro.</text:p>
      <text:p text:style-name="P2"/>
      <text:h text:style-name="P1" text:outline-level="3">4. GROUP BY — Agrupando por categoria</text:h>
      <text:p text:style-name="Text_20_body">A utilidade real emerge quando você quer calcular agregações <text:span text:style-name="Strong_20_Emphasis">por subconjunto</text:span> dos dados, não sobre o total.</text:p>
      <text:p text:style-name="Text_20_body"><text:soft-page-break/>Exemplo: você não quer saber o total de pedidos de todos os clientes — você quer saber quantos pedidos <text:span text:style-name="Strong_20_Emphasis">cada cliente</text:span> fez. A pergunta é por cliente, não global.</text:p>
      <text:p text:style-name="P5">sql</text:p>
      <text:p text:style-name="P6"><text:span text:style-name="Source_20_Text"><text:span text:style-name="T2">SELECT</text:span></text:span><text:span text:style-name="Source_20_Text"><text:span text:style-name="T3"> cliente_id</text:span></text:span><text:span text:style-name="Source_20_Text"><text:span text:style-name="T5">,</text:span></text:span><text:span text:style-name="Source_20_Text"><text:span text:style-name="T3"> </text:span></text:span><text:span text:style-name="Source_20_Text"><text:span text:style-name="T4">COUNT</text:span></text:span><text:span text:style-name="Source_20_Text"><text:span text:style-name="T5">(</text:span></text:span><text:span text:style-name="Source_20_Text"><text:span text:style-name="T3">*</text:span></text:span><text:span text:style-name="Source_20_Text"><text:span text:style-name="T5">)</text:span></text:span><text:span text:style-name="Source_20_Text"><text:span text:style-name="T3"> </text:span></text:span><text:span text:style-name="Source_20_Text"><text:span text:style-name="T2">AS</text:span></text:span><text:span text:style-name="Source_20_Text"><text:span text:style-name="T3"> total_pedidos</text:span></text:span></text:p>
      <text:p text:style-name="P6"><text:span text:style-name="Source_20_Text"><text:span text:style-name="T2">FROM</text:span></text:span><text:span text:style-name="Source_20_Text"><text:span text:style-name="T3"> pedidos</text:span></text:span></text:p>
      <text:p text:style-name="P6"><text:span text:style-name="Source_20_Text"><text:span text:style-name="T2">GROUP</text:span></text:span><text:span text:style-name="Source_20_Text"><text:span text:style-name="T3"> </text:span></text:span><text:span text:style-name="Source_20_Text"><text:span text:style-name="T2">BY</text:span></text:span><text:span text:style-name="Source_20_Text"><text:span text:style-name="T3"> cliente_id</text:span></text:span><text:span text:style-name="Source_20_Text"><text:span text:style-name="T5">;</text:span></text:span></text:p>
      <text:p text:style-name="P6"><text:span text:style-name="Source_20_Text"><text:span text:style-name="T3">cliente_id | total_pedidos</text:span></text:span></text:p>
      <text:p text:style-name="P7"><text:span text:style-name="Source_20_Text"><text:span text:style-name="T3">-----------|---------------</text:span></text:span></text:p>
      <text:p text:style-name="P7"><text:span text:style-name="Source_20_Text"><text:span text:style-name="T3">1 <text:s text:c="9"/>| 2</text:span></text:span></text:p>
      <text:p text:style-name="P7"><text:span text:style-name="Source_20_Text"><text:span text:style-name="T3">2 <text:s text:c="9"/>| 1</text:span></text:span></text:p>
      <text:p text:style-name="Text_20_body">O que o banco faz internamente: agrupa todas as linhas de <text:span text:style-name="Source_20_Text">pedidos</text:span> pelo valor de <text:span text:style-name="Source_20_Text">cliente_id</text:span>, formando um grupo por valor distinto. Depois aplica <text:span text:style-name="Source_20_Text">COUNT(*)</text:span> dentro de cada grupo separadamente. O resultado é uma linha por grupo.</text:p>
      <text:p text:style-name="P2"/>
      <text:h text:style-name="P1" text:outline-level="3">5. A regra fundamental do GROUP BY</text:h>
      <text:p text:style-name="Text_20_body">Essa é a regra que mais confunde iniciantes e que gera os erros mais comuns:</text:p>
      <text:p text:style-name="Text_20_body"><text:span text:style-name="Strong_20_Emphasis">Toda coluna no </text:span><text:span text:style-name="Strong_20_Emphasis"><text:span text:style-name="Source_20_Text">SELECT</text:span></text:span><text:span text:style-name="Strong_20_Emphasis"> que não está dentro de uma função de agregação deve aparecer no </text:span><text:span text:style-name="Strong_20_Emphasis"><text:span text:style-name="Source_20_Text">GROUP BY</text:span></text:span><text:span text:style-name="Strong_20_Emphasis">.</text:span></text:p>
      <text:p text:style-name="Text_20_body">Por quê? Porque quando você agrupa, cada grupo vira uma única linha no resultado. Se você tem 10 pedidos do cliente 1 agrupados numa linha, e tenta exibir a coluna <text:span text:style-name="Source_20_Text">data</text:span> — qual das 10 datas o banco deve mostrar? A pergunta não tem resposta definida. Por isso o banco rejeita:</text:p>
      <text:p text:style-name="P5">sql</text:p>
      <text:p text:style-name="P6"><text:span text:style-name="Source_20_Text"><text:span text:style-name="T1">-- ERRO: data não está no GROUP BY nem numa agregação</text:span></text:span></text:p>
      <text:p text:style-name="P6"><text:span text:style-name="Source_20_Text"><text:span text:style-name="T2">SELECT</text:span></text:span><text:span text:style-name="Source_20_Text"><text:span text:style-name="T3"> cliente_id</text:span></text:span><text:span text:style-name="Source_20_Text"><text:span text:style-name="T5">,</text:span></text:span><text:span text:style-name="Source_20_Text"><text:span text:style-name="T3"> </text:span></text:span><text:span text:style-name="Source_20_Text"><text:span text:style-name="T2">data</text:span></text:span><text:span text:style-name="Source_20_Text"><text:span text:style-name="T5">,</text:span></text:span><text:span text:style-name="Source_20_Text"><text:span text:style-name="T3"> </text:span></text:span><text:span text:style-name="Source_20_Text"><text:span text:style-name="T4">COUNT</text:span></text:span><text:span text:style-name="Source_20_Text"><text:span text:style-name="T5">(</text:span></text:span><text:span text:style-name="Source_20_Text"><text:span text:style-name="T3">*</text:span></text:span><text:span text:style-name="Source_20_Text"><text:span text:style-name="T5">)</text:span></text:span></text:p>
      <text:p text:style-name="P6"><text:span text:style-name="Source_20_Text"><text:span text:style-name="T2">FROM</text:span></text:span><text:span text:style-name="Source_20_Text"><text:span text:style-name="T3"> pedidos</text:span></text:span></text:p>
      <text:p text:style-name="P6"><text:span text:style-name="Source_20_Text"><text:span text:style-name="T2">GROUP</text:span></text:span><text:span text:style-name="Source_20_Text"><text:span text:style-name="T3"> </text:span></text:span><text:span text:style-name="Source_20_Text"><text:span text:style-name="T2">BY</text:span></text:span><text:span text:style-name="Source_20_Text"><text:span text:style-name="T3"> cliente_id</text:span></text:span><text:span text:style-name="Source_20_Text"><text:span text:style-name="T5">;</text:span></text:span></text:p>
      <text:p text:style-name="P6"><text:span text:style-name="Source_20_Text"><text:span text:style-name="T3">ERROR: column "pedidos.data" must appear in the GROUP BY clause</text:span></text:span></text:p>
      <text:p text:style-name="P7"><text:span text:style-name="Source_20_Text"><text:span text:style-name="T3">or be used in an aggregate function</text:span></text:span></text:p>
      <text:p text:style-name="Text_20_body">A solução é ou incluir <text:span text:style-name="Source_20_Text">data</text:span> no <text:span text:style-name="Source_20_Text">GROUP BY</text:span> — o que cria um grupo por combinação de <text:span text:style-name="Source_20_Text">cliente_id</text:span> e <text:span text:style-name="Source_20_Text">data</text:span> — ou agregá-la:</text:p>
      <text:p text:style-name="P5">sql</text:p>
      <text:p text:style-name="P6"><text:span text:style-name="Source_20_Text"><text:span text:style-name="T1">-- Inclui data no GROUP BY</text:span></text:span></text:p>
      <text:p text:style-name="P6"><text:span text:style-name="Source_20_Text"><text:span text:style-name="T2">SELECT</text:span></text:span><text:span text:style-name="Source_20_Text"><text:span text:style-name="T3"> cliente_id</text:span></text:span><text:span text:style-name="Source_20_Text"><text:span text:style-name="T5">,</text:span></text:span><text:span text:style-name="Source_20_Text"><text:span text:style-name="T3"> </text:span></text:span><text:span text:style-name="Source_20_Text"><text:span text:style-name="T2">data</text:span></text:span><text:span text:style-name="Source_20_Text"><text:span text:style-name="T5">,</text:span></text:span><text:span text:style-name="Source_20_Text"><text:span text:style-name="T3"> </text:span></text:span><text:span text:style-name="Source_20_Text"><text:span text:style-name="T4">COUNT</text:span></text:span><text:span text:style-name="Source_20_Text"><text:span text:style-name="T5">(</text:span></text:span><text:span text:style-name="Source_20_Text"><text:span text:style-name="T3">*</text:span></text:span><text:span text:style-name="Source_20_Text"><text:span text:style-name="T5">)</text:span></text:span></text:p>
      <text:p text:style-name="P6"><text:span text:style-name="Source_20_Text"><text:span text:style-name="T2">FROM</text:span></text:span><text:span text:style-name="Source_20_Text"><text:span text:style-name="T3"> pedidos</text:span></text:span></text:p>
      <text:p text:style-name="P6"><text:span text:style-name="Source_20_Text"><text:span text:style-name="T2">GROUP</text:span></text:span><text:span text:style-name="Source_20_Text"><text:span text:style-name="T3"> </text:span></text:span><text:span text:style-name="Source_20_Text"><text:span text:style-name="T2">BY</text:span></text:span><text:span text:style-name="Source_20_Text"><text:span text:style-name="T3"> cliente_id</text:span></text:span><text:span text:style-name="Source_20_Text"><text:span text:style-name="T5">,</text:span></text:span><text:span text:style-name="Source_20_Text"><text:span text:style-name="T3"> </text:span></text:span><text:span text:style-name="Source_20_Text"><text:span text:style-name="T2">data</text:span></text:span><text:span text:style-name="Source_20_Text"><text:span text:style-name="T5">;</text:span></text:span></text:p>
      <text:p text:style-name="P7"/>
      <text:p text:style-name="P6"><text:soft-page-break/><text:span text:style-name="Source_20_Text"><text:span text:style-name="T1">-- Ou usa MAX(data) para pegar a mais recente de cada cliente</text:span></text:span></text:p>
      <text:p text:style-name="P6"><text:span text:style-name="Source_20_Text"><text:span text:style-name="T2">SELECT</text:span></text:span><text:span text:style-name="Source_20_Text"><text:span text:style-name="T3"> cliente_id</text:span></text:span><text:span text:style-name="Source_20_Text"><text:span text:style-name="T5">,</text:span></text:span><text:span text:style-name="Source_20_Text"><text:span text:style-name="T3"> </text:span></text:span><text:span text:style-name="Source_20_Text"><text:span text:style-name="T4">MAX</text:span></text:span><text:span text:style-name="Source_20_Text"><text:span text:style-name="T5">(</text:span></text:span><text:span text:style-name="Source_20_Text"><text:span text:style-name="T2">data</text:span></text:span><text:span text:style-name="Source_20_Text"><text:span text:style-name="T5">)</text:span></text:span><text:span text:style-name="Source_20_Text"><text:span text:style-name="T3"> </text:span></text:span><text:span text:style-name="Source_20_Text"><text:span text:style-name="T2">AS</text:span></text:span><text:span text:style-name="Source_20_Text"><text:span text:style-name="T3"> ultimo_pedido</text:span></text:span><text:span text:style-name="Source_20_Text"><text:span text:style-name="T5">,</text:span></text:span><text:span text:style-name="Source_20_Text"><text:span text:style-name="T3"> </text:span></text:span><text:span text:style-name="Source_20_Text"><text:span text:style-name="T4">COUNT</text:span></text:span><text:span text:style-name="Source_20_Text"><text:span text:style-name="T5">(</text:span></text:span><text:span text:style-name="Source_20_Text"><text:span text:style-name="T3">*</text:span></text:span><text:span text:style-name="Source_20_Text"><text:span text:style-name="T5">)</text:span></text:span><text:span text:style-name="Source_20_Text"><text:span text:style-name="T3"> </text:span></text:span><text:span text:style-name="Source_20_Text"><text:span text:style-name="T2">AS</text:span></text:span><text:span text:style-name="Source_20_Text"><text:span text:style-name="T3"> total</text:span></text:span></text:p>
      <text:p text:style-name="P6"><text:span text:style-name="Source_20_Text"><text:span text:style-name="T2">FROM</text:span></text:span><text:span text:style-name="Source_20_Text"><text:span text:style-name="T3"> pedidos</text:span></text:span></text:p>
      <text:p text:style-name="P6"><text:span text:style-name="Source_20_Text"><text:span text:style-name="T2">GROUP</text:span></text:span><text:span text:style-name="Source_20_Text"><text:span text:style-name="T3"> </text:span></text:span><text:span text:style-name="Source_20_Text"><text:span text:style-name="T2">BY</text:span></text:span><text:span text:style-name="Source_20_Text"><text:span text:style-name="T3"> cliente_id</text:span></text:span><text:span text:style-name="Source_20_Text"><text:span text:style-name="T5">;</text:span></text:span></text:p>
      <text:p text:style-name="P2"/>
      <text:h text:style-name="P1" text:outline-level="3">6. Combinando GROUP BY com WHERE</text:h>
      <text:p text:style-name="Text_20_body"><text:span text:style-name="Source_20_Text">WHERE</text:span> e <text:span text:style-name="Source_20_Text">GROUP BY</text:span> podem coexistir na mesma query. Lembre da ordem de execução:</text:p>
      <text:p text:style-name="P6"><text:span text:style-name="Source_20_Text"><text:span text:style-name="T3">FROM → WHERE → GROUP BY → SELECT → ORDER BY</text:span></text:span></text:p>
      <text:p text:style-name="Text_20_body"><text:span text:style-name="Source_20_Text">WHERE</text:span> filtra as linhas <text:span text:style-name="Strong_20_Emphasis">antes</text:span> do agrupamento. Isso significa que você pode excluir linhas do cálculo antes de agrupar:</text:p>
      <text:p text:style-name="P5">sql</text:p>
      <text:p text:style-name="P6"><text:span text:style-name="Source_20_Text"><text:span text:style-name="T1">-- Total de pedidos por cliente, considerando apenas pedidos de 2026</text:span></text:span></text:p>
      <text:p text:style-name="P6"><text:span text:style-name="Source_20_Text"><text:span text:style-name="T2">SELECT</text:span></text:span><text:span text:style-name="Source_20_Text"><text:span text:style-name="T3"> cliente_id</text:span></text:span><text:span text:style-name="Source_20_Text"><text:span text:style-name="T5">,</text:span></text:span><text:span text:style-name="Source_20_Text"><text:span text:style-name="T3"> </text:span></text:span><text:span text:style-name="Source_20_Text"><text:span text:style-name="T4">COUNT</text:span></text:span><text:span text:style-name="Source_20_Text"><text:span text:style-name="T5">(</text:span></text:span><text:span text:style-name="Source_20_Text"><text:span text:style-name="T3">*</text:span></text:span><text:span text:style-name="Source_20_Text"><text:span text:style-name="T5">)</text:span></text:span><text:span text:style-name="Source_20_Text"><text:span text:style-name="T3"> </text:span></text:span><text:span text:style-name="Source_20_Text"><text:span text:style-name="T2">AS</text:span></text:span><text:span text:style-name="Source_20_Text"><text:span text:style-name="T3"> total_pedidos</text:span></text:span></text:p>
      <text:p text:style-name="P6"><text:span text:style-name="Source_20_Text"><text:span text:style-name="T2">FROM</text:span></text:span><text:span text:style-name="Source_20_Text"><text:span text:style-name="T3"> pedidos</text:span></text:span></text:p>
      <text:p text:style-name="P6"><text:span text:style-name="Source_20_Text"><text:span text:style-name="T2">WHERE</text:span></text:span><text:span text:style-name="Source_20_Text"><text:span text:style-name="T3"> </text:span></text:span><text:span text:style-name="Source_20_Text"><text:span text:style-name="T2">data</text:span></text:span><text:span text:style-name="Source_20_Text"><text:span text:style-name="T3"> &gt;= </text:span></text:span><text:span text:style-name="Source_20_Text"><text:span text:style-name="T7">'2026-01-01'</text:span></text:span></text:p>
      <text:p text:style-name="P6"><text:span text:style-name="Source_20_Text"><text:span text:style-name="T2">GROUP</text:span></text:span><text:span text:style-name="Source_20_Text"><text:span text:style-name="T3"> </text:span></text:span><text:span text:style-name="Source_20_Text"><text:span text:style-name="T2">BY</text:span></text:span><text:span text:style-name="Source_20_Text"><text:span text:style-name="T3"> cliente_id</text:span></text:span><text:span text:style-name="Source_20_Text"><text:span text:style-name="T5">;</text:span></text:span></text:p>
      <text:p text:style-name="Text_20_body">O banco primeiro filtra os pedidos de 2026, depois agrupa os resultados filtrados por cliente. Pedidos de anos anteriores não entram no cálculo.</text:p>
      <text:p text:style-name="P2"/>
      <text:h text:style-name="P1" text:outline-level="3">7. HAVING — Filtrando grupos</text:h>
      <text:p text:style-name="Text_20_body">Se <text:span text:style-name="Source_20_Text">WHERE</text:span> filtra linhas antes do agrupamento, <text:span text:style-name="Strong_20_Emphasis"><text:span text:style-name="Source_20_Text">HAVING</text:span></text:span> filtra grupos depois do agrupamento.</text:p>
      <text:p text:style-name="Text_20_body">Você não pode usar funções de agregação no <text:span text:style-name="Source_20_Text">WHERE</text:span> — porque <text:span text:style-name="Source_20_Text">WHERE</text:span> é executado antes da agregação acontecer:</text:p>
      <text:p text:style-name="P5">sql</text:p>
      <text:p text:style-name="P6"><text:span text:style-name="Source_20_Text"><text:span text:style-name="T1">-- ERRO: COUNT não pode aparecer no WHERE</text:span></text:span></text:p>
      <text:p text:style-name="P6"><text:span text:style-name="Source_20_Text"><text:span text:style-name="T2">SELECT</text:span></text:span><text:span text:style-name="Source_20_Text"><text:span text:style-name="T3"> cliente_id</text:span></text:span><text:span text:style-name="Source_20_Text"><text:span text:style-name="T5">,</text:span></text:span><text:span text:style-name="Source_20_Text"><text:span text:style-name="T3"> </text:span></text:span><text:span text:style-name="Source_20_Text"><text:span text:style-name="T4">COUNT</text:span></text:span><text:span text:style-name="Source_20_Text"><text:span text:style-name="T5">(</text:span></text:span><text:span text:style-name="Source_20_Text"><text:span text:style-name="T3">*</text:span></text:span><text:span text:style-name="Source_20_Text"><text:span text:style-name="T5">)</text:span></text:span><text:span text:style-name="Source_20_Text"><text:span text:style-name="T3"> </text:span></text:span><text:span text:style-name="Source_20_Text"><text:span text:style-name="T2">AS</text:span></text:span><text:span text:style-name="Source_20_Text"><text:span text:style-name="T3"> total_pedidos</text:span></text:span></text:p>
      <text:p text:style-name="P6"><text:span text:style-name="Source_20_Text"><text:span text:style-name="T2">FROM</text:span></text:span><text:span text:style-name="Source_20_Text"><text:span text:style-name="T3"> pedidos</text:span></text:span></text:p>
      <text:p text:style-name="P6"><text:span text:style-name="Source_20_Text"><text:span text:style-name="T2">WHERE</text:span></text:span><text:span text:style-name="Source_20_Text"><text:span text:style-name="T3"> </text:span></text:span><text:span text:style-name="Source_20_Text"><text:span text:style-name="T4">COUNT</text:span></text:span><text:span text:style-name="Source_20_Text"><text:span text:style-name="T5">(</text:span></text:span><text:span text:style-name="Source_20_Text"><text:span text:style-name="T3">*</text:span></text:span><text:span text:style-name="Source_20_Text"><text:span text:style-name="T5">)</text:span></text:span><text:span text:style-name="Source_20_Text"><text:span text:style-name="T3"> &gt; </text:span></text:span><text:span text:style-name="Source_20_Text"><text:span text:style-name="T8">1</text:span></text:span></text:p>
      <text:p text:style-name="P6"><text:span text:style-name="Source_20_Text"><text:span text:style-name="T2">GROUP</text:span></text:span><text:span text:style-name="Source_20_Text"><text:span text:style-name="T3"> </text:span></text:span><text:span text:style-name="Source_20_Text"><text:span text:style-name="T2">BY</text:span></text:span><text:span text:style-name="Source_20_Text"><text:span text:style-name="T3"> cliente_id</text:span></text:span><text:span text:style-name="Source_20_Text"><text:span text:style-name="T5">;</text:span></text:span></text:p>
      <text:p text:style-name="Text_20_body">A solução é <text:span text:style-name="Source_20_Text">HAVING</text:span>:</text:p>
      <text:p text:style-name="P5">sql</text:p>
      <text:p text:style-name="P6"><text:span text:style-name="Source_20_Text"><text:span text:style-name="T1">-- Clientes com mais de 1 pedido</text:span></text:span></text:p>
      <text:p text:style-name="P6"><text:span text:style-name="Source_20_Text"><text:span text:style-name="T2">SELECT</text:span></text:span><text:span text:style-name="Source_20_Text"><text:span text:style-name="T3"> cliente_id</text:span></text:span><text:span text:style-name="Source_20_Text"><text:span text:style-name="T5">,</text:span></text:span><text:span text:style-name="Source_20_Text"><text:span text:style-name="T3"> </text:span></text:span><text:span text:style-name="Source_20_Text"><text:span text:style-name="T4">COUNT</text:span></text:span><text:span text:style-name="Source_20_Text"><text:span text:style-name="T5">(</text:span></text:span><text:span text:style-name="Source_20_Text"><text:span text:style-name="T3">*</text:span></text:span><text:span text:style-name="Source_20_Text"><text:span text:style-name="T5">)</text:span></text:span><text:span text:style-name="Source_20_Text"><text:span text:style-name="T3"> </text:span></text:span><text:span text:style-name="Source_20_Text"><text:span text:style-name="T2">AS</text:span></text:span><text:span text:style-name="Source_20_Text"><text:span text:style-name="T3"> total_pedidos</text:span></text:span></text:p>
      <text:p text:style-name="P6"><text:span text:style-name="Source_20_Text"><text:span text:style-name="T2">FROM</text:span></text:span><text:span text:style-name="Source_20_Text"><text:span text:style-name="T3"> pedidos</text:span></text:span></text:p>
      <text:p text:style-name="P6"><text:span text:style-name="Source_20_Text"><text:span text:style-name="T2">GROUP</text:span></text:span><text:span text:style-name="Source_20_Text"><text:span text:style-name="T3"> </text:span></text:span><text:span text:style-name="Source_20_Text"><text:span text:style-name="T2">BY</text:span></text:span><text:span text:style-name="Source_20_Text"><text:span text:style-name="T3"> cliente_id</text:span></text:span></text:p>
      <text:p text:style-name="P6"><text:soft-page-break/><text:span text:style-name="Source_20_Text"><text:span text:style-name="T2">HAVING</text:span></text:span><text:span text:style-name="Source_20_Text"><text:span text:style-name="T3"> </text:span></text:span><text:span text:style-name="Source_20_Text"><text:span text:style-name="T4">COUNT</text:span></text:span><text:span text:style-name="Source_20_Text"><text:span text:style-name="T5">(</text:span></text:span><text:span text:style-name="Source_20_Text"><text:span text:style-name="T3">*</text:span></text:span><text:span text:style-name="Source_20_Text"><text:span text:style-name="T5">)</text:span></text:span><text:span text:style-name="Source_20_Text"><text:span text:style-name="T3"> &gt; </text:span></text:span><text:span text:style-name="Source_20_Text"><text:span text:style-name="T8">1</text:span></text:span><text:span text:style-name="Source_20_Text"><text:span text:style-name="T5">;</text:span></text:span></text:p>
      <text:p text:style-name="P6"><text:span text:style-name="Source_20_Text"><text:span text:style-name="T3">cliente_id | total_pedidos</text:span></text:span></text:p>
      <text:p text:style-name="P7"><text:span text:style-name="Source_20_Text"><text:span text:style-name="T3">-----------|---------------</text:span></text:span></text:p>
      <text:p text:style-name="P7"><text:span text:style-name="Source_20_Text"><text:span text:style-name="T3">1 <text:s text:c="9"/>| 2</text:span></text:span></text:p>
      <text:p text:style-name="Text_20_body">A ordem completa de execução com <text:span text:style-name="Source_20_Text">HAVING</text:span>:</text:p>
      <text:p text:style-name="P6"><text:span text:style-name="Source_20_Text"><text:span text:style-name="T3">FROM → WHERE → GROUP BY → HAVING → SELECT → ORDER BY</text:span></text:span></text:p>
      <text:p text:style-name="Text_20_body"><text:span text:style-name="Source_20_Text">HAVING</text:span> age sobre grupos já formados — é o <text:span text:style-name="Source_20_Text">WHERE</text:span> dos grupos.</text:p>
      <text:p text:style-name="P2"/>
      <text:h text:style-name="P1" text:outline-level="3">8. WHERE vs HAVING — A distinção precisa</text:h>
      <text:p text:style-name="Text_20_body">Essa confusão é tão comum que merece um exemplo direto:</text:p>
      <text:p text:style-name="P5">sql</text:p>
      <text:p text:style-name="P6"><text:span text:style-name="Source_20_Text"><text:span text:style-name="T2">SELECT</text:span></text:span><text:span text:style-name="Source_20_Text"><text:span text:style-name="T3"> cliente_id</text:span></text:span><text:span text:style-name="Source_20_Text"><text:span text:style-name="T5">,</text:span></text:span><text:span text:style-name="Source_20_Text"><text:span text:style-name="T3"> </text:span></text:span><text:span text:style-name="Source_20_Text"><text:span text:style-name="T4">COUNT</text:span></text:span><text:span text:style-name="Source_20_Text"><text:span text:style-name="T5">(</text:span></text:span><text:span text:style-name="Source_20_Text"><text:span text:style-name="T3">*</text:span></text:span><text:span text:style-name="Source_20_Text"><text:span text:style-name="T5">)</text:span></text:span><text:span text:style-name="Source_20_Text"><text:span text:style-name="T3"> </text:span></text:span><text:span text:style-name="Source_20_Text"><text:span text:style-name="T2">AS</text:span></text:span><text:span text:style-name="Source_20_Text"><text:span text:style-name="T3"> total_pedidos</text:span></text:span></text:p>
      <text:p text:style-name="P6"><text:span text:style-name="Source_20_Text"><text:span text:style-name="T2">FROM</text:span></text:span><text:span text:style-name="Source_20_Text"><text:span text:style-name="T3"> pedidos</text:span></text:span></text:p>
      <text:p text:style-name="P6"><text:span text:style-name="Source_20_Text"><text:span text:style-name="T2">WHERE</text:span></text:span><text:span text:style-name="Source_20_Text"><text:span text:style-name="T3"> cliente_id &lt;&gt; </text:span></text:span><text:span text:style-name="Source_20_Text"><text:span text:style-name="T8">2</text:span></text:span><text:span text:style-name="Source_20_Text"><text:span text:style-name="T3"> <text:s text:c="9"/></text:span></text:span><text:span text:style-name="Source_20_Text"><text:span text:style-name="T1">-- filtra LINHAS antes de agrupar</text:span></text:span></text:p>
      <text:p text:style-name="P6"><text:span text:style-name="Source_20_Text"><text:span text:style-name="T2">GROUP</text:span></text:span><text:span text:style-name="Source_20_Text"><text:span text:style-name="T3"> </text:span></text:span><text:span text:style-name="Source_20_Text"><text:span text:style-name="T2">BY</text:span></text:span><text:span text:style-name="Source_20_Text"><text:span text:style-name="T3"> cliente_id</text:span></text:span></text:p>
      <text:p text:style-name="P6"><text:span text:style-name="Source_20_Text"><text:span text:style-name="T2">HAVING</text:span></text:span><text:span text:style-name="Source_20_Text"><text:span text:style-name="T3"> </text:span></text:span><text:span text:style-name="Source_20_Text"><text:span text:style-name="T4">COUNT</text:span></text:span><text:span text:style-name="Source_20_Text"><text:span text:style-name="T5">(</text:span></text:span><text:span text:style-name="Source_20_Text"><text:span text:style-name="T3">*</text:span></text:span><text:span text:style-name="Source_20_Text"><text:span text:style-name="T5">)</text:span></text:span><text:span text:style-name="Source_20_Text"><text:span text:style-name="T3"> &gt;= </text:span></text:span><text:span text:style-name="Source_20_Text"><text:span text:style-name="T8">1</text:span></text:span><text:span text:style-name="Source_20_Text"><text:span text:style-name="T5">;</text:span></text:span><text:span text:style-name="Source_20_Text"><text:span text:style-name="T3"> <text:s text:c="9"/></text:span></text:span><text:span text:style-name="Source_20_Text"><text:span text:style-name="T1">-- filtra GRUPOS depois de agrupar</text:span></text:span></text:p>
      <text:p text:style-name="P6"><text:span text:style-name="Source_20_Text"><text:span text:style-name="T2">ORDER</text:span></text:span><text:span text:style-name="Source_20_Text"><text:span text:style-name="T3"> </text:span></text:span><text:span text:style-name="Source_20_Text"><text:span text:style-name="T2">BY</text:span></text:span><text:span text:style-name="Source_20_Text"><text:span text:style-name="T3"> total_pedidos </text:span></text:span><text:span text:style-name="Source_20_Text"><text:span text:style-name="T2">DESC</text:span></text:span><text:span text:style-name="Source_20_Text"><text:span text:style-name="T5">;</text:span></text:span></text:p>
      <text:p text:style-name="Text_20_body"><text:span text:style-name="Strong_20_Emphasis"><text:span text:style-name="Source_20_Text">WHERE cliente_id &lt;&gt; 2</text:span></text:span> — remove as linhas do cliente 2 antes de qualquer agrupamento. O cliente 2 não entra nem no cálculo.</text:p>
      <text:p text:style-name="Text_20_body"><text:span text:style-name="Strong_20_Emphasis"><text:span text:style-name="Source_20_Text">HAVING COUNT(*) &gt;= 1</text:span></text:span> — após agrupar, descarta grupos com menos de 1 pedido. Opera sobre os grupos já calculados.</text:p>
      <text:p text:style-name="Text_20_body">A regra prática: se o filtro é sobre uma coluna original da tabela, use <text:span text:style-name="Source_20_Text">WHERE</text:span>. Se o filtro é sobre o resultado de uma agregação, use <text:span text:style-name="Source_20_Text">HAVING</text:span>.</text:p>
      <text:p text:style-name="P2"/>
      <text:h text:style-name="P1" text:outline-level="3">9. GROUP BY com ORDER BY</text:h>
      <text:p text:style-name="Text_20_body"><text:span text:style-name="Source_20_Text">ORDER BY</text:span> pode ordenar pelo resultado de agregações — e é muito comum fazer isso:</text:p>
      <text:p text:style-name="P5">sql</text:p>
      <text:p text:style-name="P6"><text:span text:style-name="Source_20_Text"><text:span text:style-name="T1">-- Clientes ordenados do que mais comprou para o que menos comprou</text:span></text:span></text:p>
      <text:p text:style-name="P6"><text:span text:style-name="Source_20_Text"><text:span text:style-name="T2">SELECT</text:span></text:span><text:span text:style-name="Source_20_Text"><text:span text:style-name="T3"> cliente_id</text:span></text:span><text:span text:style-name="Source_20_Text"><text:span text:style-name="T5">,</text:span></text:span><text:span text:style-name="Source_20_Text"><text:span text:style-name="T3"> </text:span></text:span><text:span text:style-name="Source_20_Text"><text:span text:style-name="T4">COUNT</text:span></text:span><text:span text:style-name="Source_20_Text"><text:span text:style-name="T5">(</text:span></text:span><text:span text:style-name="Source_20_Text"><text:span text:style-name="T3">*</text:span></text:span><text:span text:style-name="Source_20_Text"><text:span text:style-name="T5">)</text:span></text:span><text:span text:style-name="Source_20_Text"><text:span text:style-name="T3"> </text:span></text:span><text:span text:style-name="Source_20_Text"><text:span text:style-name="T2">AS</text:span></text:span><text:span text:style-name="Source_20_Text"><text:span text:style-name="T3"> total_pedidos</text:span></text:span></text:p>
      <text:p text:style-name="P6"><text:span text:style-name="Source_20_Text"><text:span text:style-name="T2">FROM</text:span></text:span><text:span text:style-name="Source_20_Text"><text:span text:style-name="T3"> pedidos</text:span></text:span></text:p>
      <text:p text:style-name="P6"><text:span text:style-name="Source_20_Text"><text:span text:style-name="T2">GROUP</text:span></text:span><text:span text:style-name="Source_20_Text"><text:span text:style-name="T3"> </text:span></text:span><text:span text:style-name="Source_20_Text"><text:span text:style-name="T2">BY</text:span></text:span><text:span text:style-name="Source_20_Text"><text:span text:style-name="T3"> cliente_id</text:span></text:span></text:p>
      <text:p text:style-name="P6"><text:span text:style-name="Source_20_Text"><text:span text:style-name="T2">ORDER</text:span></text:span><text:span text:style-name="Source_20_Text"><text:span text:style-name="T3"> </text:span></text:span><text:span text:style-name="Source_20_Text"><text:span text:style-name="T2">BY</text:span></text:span><text:span text:style-name="Source_20_Text"><text:span text:style-name="T3"> total_pedidos </text:span></text:span><text:span text:style-name="Source_20_Text"><text:span text:style-name="T2">DESC</text:span></text:span><text:span text:style-name="Source_20_Text"><text:span text:style-name="T5">;</text:span></text:span></text:p>
      <text:p text:style-name="P5">sql</text:p>
      <text:p text:style-name="P6"><text:span text:style-name="Source_20_Text"><text:span text:style-name="T1">-- Soma do valor total por pedido, do mais caro para o mais barato</text:span></text:span></text:p>
      <text:p text:style-name="P6"><text:span text:style-name="Source_20_Text"><text:span text:style-name="T2">SELECT</text:span></text:span><text:span text:style-name="Source_20_Text"><text:span text:style-name="T3"> pedido_id</text:span></text:span><text:span text:style-name="Source_20_Text"><text:span text:style-name="T5">,</text:span></text:span></text:p>
      <text:p text:style-name="P6"><text:soft-page-break/><text:span text:style-name="Source_20_Text"><text:span text:style-name="T6"><text:s text:c="7"/></text:span></text:span><text:span text:style-name="Source_20_Text"><text:span text:style-name="T4">SUM</text:span></text:span><text:span text:style-name="Source_20_Text"><text:span text:style-name="T5">(</text:span></text:span><text:span text:style-name="Source_20_Text"><text:span text:style-name="T3">quantidade * preco_unit</text:span></text:span><text:span text:style-name="Source_20_Text"><text:span text:style-name="T5">)</text:span></text:span><text:span text:style-name="Source_20_Text"><text:span text:style-name="T3"> </text:span></text:span><text:span text:style-name="Source_20_Text"><text:span text:style-name="T2">AS</text:span></text:span><text:span text:style-name="Source_20_Text"><text:span text:style-name="T3"> valor_total</text:span></text:span></text:p>
      <text:p text:style-name="P6"><text:span text:style-name="Source_20_Text"><text:span text:style-name="T2">FROM</text:span></text:span><text:span text:style-name="Source_20_Text"><text:span text:style-name="T3"> itens_pedido</text:span></text:span></text:p>
      <text:p text:style-name="P6"><text:span text:style-name="Source_20_Text"><text:span text:style-name="T2">GROUP</text:span></text:span><text:span text:style-name="Source_20_Text"><text:span text:style-name="T3"> </text:span></text:span><text:span text:style-name="Source_20_Text"><text:span text:style-name="T2">BY</text:span></text:span><text:span text:style-name="Source_20_Text"><text:span text:style-name="T3"> pedido_id</text:span></text:span></text:p>
      <text:p text:style-name="P6"><text:span text:style-name="Source_20_Text"><text:span text:style-name="T2">ORDER</text:span></text:span><text:span text:style-name="Source_20_Text"><text:span text:style-name="T3"> </text:span></text:span><text:span text:style-name="Source_20_Text"><text:span text:style-name="T2">BY</text:span></text:span><text:span text:style-name="Source_20_Text"><text:span text:style-name="T3"> valor_total </text:span></text:span><text:span text:style-name="Source_20_Text"><text:span text:style-name="T2">DESC</text:span></text:span><text:span text:style-name="Source_20_Text"><text:span text:style-name="T5">;</text:span></text:span></text:p>
      <text:p text:style-name="P2"/>
      <text:h text:style-name="P1" text:outline-level="3">10. As consultas analíticas do projeto</text:h>
      <text:p text:style-name="Text_20_body">Aplicando tudo ao projeto Loja Simples:</text:p>
      <text:p text:style-name="P5">sql</text:p>
      <text:p text:style-name="P6"><text:span text:style-name="Source_20_Text"><text:span text:style-name="T1">-- Quantidade total de produtos cadastrados</text:span></text:span></text:p>
      <text:p text:style-name="P6"><text:span text:style-name="Source_20_Text"><text:span text:style-name="T2">SELECT</text:span></text:span><text:span text:style-name="Source_20_Text"><text:span text:style-name="T3"> </text:span></text:span><text:span text:style-name="Source_20_Text"><text:span text:style-name="T4">COUNT</text:span></text:span><text:span text:style-name="Source_20_Text"><text:span text:style-name="T5">(</text:span></text:span><text:span text:style-name="Source_20_Text"><text:span text:style-name="T3">*</text:span></text:span><text:span text:style-name="Source_20_Text"><text:span text:style-name="T5">)</text:span></text:span><text:span text:style-name="Source_20_Text"><text:span text:style-name="T3"> </text:span></text:span><text:span text:style-name="Source_20_Text"><text:span text:style-name="T2">AS</text:span></text:span><text:span text:style-name="Source_20_Text"><text:span text:style-name="T3"> total_produtos </text:span></text:span><text:span text:style-name="Source_20_Text"><text:span text:style-name="T2">FROM</text:span></text:span><text:span text:style-name="Source_20_Text"><text:span text:style-name="T3"> produtos</text:span></text:span><text:span text:style-name="Source_20_Text"><text:span text:style-name="T5">;</text:span></text:span></text:p>
      <text:p text:style-name="P7"/>
      <text:p text:style-name="P6"><text:span text:style-name="Source_20_Text"><text:span text:style-name="T1">-- Média de preço dos produtos</text:span></text:span></text:p>
      <text:p text:style-name="P6"><text:span text:style-name="Source_20_Text"><text:span text:style-name="T2">SELECT</text:span></text:span><text:span text:style-name="Source_20_Text"><text:span text:style-name="T3"> </text:span></text:span><text:span text:style-name="Source_20_Text"><text:span text:style-name="T4">ROUND</text:span></text:span><text:span text:style-name="Source_20_Text"><text:span text:style-name="T5">(</text:span></text:span><text:span text:style-name="Source_20_Text"><text:span text:style-name="T4">AVG</text:span></text:span><text:span text:style-name="Source_20_Text"><text:span text:style-name="T5">(</text:span></text:span><text:span text:style-name="Source_20_Text"><text:span text:style-name="T3">preco</text:span></text:span><text:span text:style-name="Source_20_Text"><text:span text:style-name="T5">),</text:span></text:span><text:span text:style-name="Source_20_Text"><text:span text:style-name="T3"> </text:span></text:span><text:span text:style-name="Source_20_Text"><text:span text:style-name="T8">2</text:span></text:span><text:span text:style-name="Source_20_Text"><text:span text:style-name="T5">)</text:span></text:span><text:span text:style-name="Source_20_Text"><text:span text:style-name="T3"> </text:span></text:span><text:span text:style-name="Source_20_Text"><text:span text:style-name="T2">AS</text:span></text:span><text:span text:style-name="Source_20_Text"><text:span text:style-name="T3"> preco_medio </text:span></text:span><text:span text:style-name="Source_20_Text"><text:span text:style-name="T2">FROM</text:span></text:span><text:span text:style-name="Source_20_Text"><text:span text:style-name="T3"> produtos</text:span></text:span><text:span text:style-name="Source_20_Text"><text:span text:style-name="T5">;</text:span></text:span></text:p>
      <text:p text:style-name="Text_20_body"><text:span text:style-name="Source_20_Text">ROUND(valor, casas_decimais)</text:span> arredonda o resultado — útil porque <text:span text:style-name="Source_20_Text">AVG</text:span> frequentemente retorna muitas casas decimais.</text:p>
      <text:p text:style-name="P5">sql</text:p>
      <text:p text:style-name="P6"><text:span text:style-name="Source_20_Text"><text:span text:style-name="T1">-- Total de pedidos por cliente</text:span></text:span></text:p>
      <text:p text:style-name="P6"><text:span text:style-name="Source_20_Text"><text:span text:style-name="T2">SELECT</text:span></text:span><text:span text:style-name="Source_20_Text"><text:span text:style-name="T3"> cliente_id</text:span></text:span><text:span text:style-name="Source_20_Text"><text:span text:style-name="T5">,</text:span></text:span><text:span text:style-name="Source_20_Text"><text:span text:style-name="T3"> </text:span></text:span><text:span text:style-name="Source_20_Text"><text:span text:style-name="T4">COUNT</text:span></text:span><text:span text:style-name="Source_20_Text"><text:span text:style-name="T5">(</text:span></text:span><text:span text:style-name="Source_20_Text"><text:span text:style-name="T3">*</text:span></text:span><text:span text:style-name="Source_20_Text"><text:span text:style-name="T5">)</text:span></text:span><text:span text:style-name="Source_20_Text"><text:span text:style-name="T3"> </text:span></text:span><text:span text:style-name="Source_20_Text"><text:span text:style-name="T2">AS</text:span></text:span><text:span text:style-name="Source_20_Text"><text:span text:style-name="T3"> total_pedidos</text:span></text:span></text:p>
      <text:p text:style-name="P6"><text:span text:style-name="Source_20_Text"><text:span text:style-name="T2">FROM</text:span></text:span><text:span text:style-name="Source_20_Text"><text:span text:style-name="T3"> pedidos</text:span></text:span></text:p>
      <text:p text:style-name="P6"><text:span text:style-name="Source_20_Text"><text:span text:style-name="T2">GROUP</text:span></text:span><text:span text:style-name="Source_20_Text"><text:span text:style-name="T3"> </text:span></text:span><text:span text:style-name="Source_20_Text"><text:span text:style-name="T2">BY</text:span></text:span><text:span text:style-name="Source_20_Text"><text:span text:style-name="T3"> cliente_id</text:span></text:span></text:p>
      <text:p text:style-name="P6"><text:span text:style-name="Source_20_Text"><text:span text:style-name="T2">ORDER</text:span></text:span><text:span text:style-name="Source_20_Text"><text:span text:style-name="T3"> </text:span></text:span><text:span text:style-name="Source_20_Text"><text:span text:style-name="T2">BY</text:span></text:span><text:span text:style-name="Source_20_Text"><text:span text:style-name="T3"> total_pedidos </text:span></text:span><text:span text:style-name="Source_20_Text"><text:span text:style-name="T2">DESC</text:span></text:span><text:span text:style-name="Source_20_Text"><text:span text:style-name="T5">;</text:span></text:span></text:p>
      <text:p text:style-name="P7"/>
      <text:p text:style-name="P6"><text:span text:style-name="Source_20_Text"><text:span text:style-name="T1">-- Soma do valor total de cada pedido</text:span></text:span></text:p>
      <text:p text:style-name="P6"><text:span text:style-name="Source_20_Text"><text:span text:style-name="T2">SELECT</text:span></text:span><text:span text:style-name="Source_20_Text"><text:span text:style-name="T3"> pedido_id</text:span></text:span><text:span text:style-name="Source_20_Text"><text:span text:style-name="T5">,</text:span></text:span></text:p>
      <text:p text:style-name="P6"><text:span text:style-name="Source_20_Text"><text:span text:style-name="T6"><text:s text:c="7"/></text:span></text:span><text:span text:style-name="Source_20_Text"><text:span text:style-name="T4">SUM</text:span></text:span><text:span text:style-name="Source_20_Text"><text:span text:style-name="T5">(</text:span></text:span><text:span text:style-name="Source_20_Text"><text:span text:style-name="T3">quantidade * preco_unit</text:span></text:span><text:span text:style-name="Source_20_Text"><text:span text:style-name="T5">)</text:span></text:span><text:span text:style-name="Source_20_Text"><text:span text:style-name="T3"> </text:span></text:span><text:span text:style-name="Source_20_Text"><text:span text:style-name="T2">AS</text:span></text:span><text:span text:style-name="Source_20_Text"><text:span text:style-name="T3"> valor_total</text:span></text:span></text:p>
      <text:p text:style-name="P6"><text:span text:style-name="Source_20_Text"><text:span text:style-name="T2">FROM</text:span></text:span><text:span text:style-name="Source_20_Text"><text:span text:style-name="T3"> itens_pedido</text:span></text:span></text:p>
      <text:p text:style-name="P6"><text:span text:style-name="Source_20_Text"><text:span text:style-name="T2">GROUP</text:span></text:span><text:span text:style-name="Source_20_Text"><text:span text:style-name="T3"> </text:span></text:span><text:span text:style-name="Source_20_Text"><text:span text:style-name="T2">BY</text:span></text:span><text:span text:style-name="Source_20_Text"><text:span text:style-name="T3"> pedido_id</text:span></text:span></text:p>
      <text:p text:style-name="P6"><text:span text:style-name="Source_20_Text"><text:span text:style-name="T2">ORDER</text:span></text:span><text:span text:style-name="Source_20_Text"><text:span text:style-name="T3"> </text:span></text:span><text:span text:style-name="Source_20_Text"><text:span text:style-name="T2">BY</text:span></text:span><text:span text:style-name="Source_20_Text"><text:span text:style-name="T3"> valor_total </text:span></text:span><text:span text:style-name="Source_20_Text"><text:span text:style-name="T2">DESC</text:span></text:span><text:span text:style-name="Source_20_Text"><text:span text:style-name="T5">;</text:span></text:span></text:p>
      <text:p text:style-name="P7"/>
      <text:p text:style-name="P6"><text:span text:style-name="Source_20_Text"><text:span text:style-name="T1">-- Valor médio dos pedidos</text:span></text:span></text:p>
      <text:p text:style-name="P6"><text:span text:style-name="Source_20_Text"><text:span text:style-name="T2">SELECT</text:span></text:span><text:span text:style-name="Source_20_Text"><text:span text:style-name="T3"> </text:span></text:span><text:span text:style-name="Source_20_Text"><text:span text:style-name="T4">ROUND</text:span></text:span><text:span text:style-name="Source_20_Text"><text:span text:style-name="T5">(</text:span></text:span><text:span text:style-name="Source_20_Text"><text:span text:style-name="T4">AVG</text:span></text:span><text:span text:style-name="Source_20_Text"><text:span text:style-name="T5">(</text:span></text:span><text:span text:style-name="Source_20_Text"><text:span text:style-name="T3">valor_total</text:span></text:span><text:span text:style-name="Source_20_Text"><text:span text:style-name="T5">),</text:span></text:span><text:span text:style-name="Source_20_Text"><text:span text:style-name="T3"> </text:span></text:span><text:span text:style-name="Source_20_Text"><text:span text:style-name="T8">2</text:span></text:span><text:span text:style-name="Source_20_Text"><text:span text:style-name="T5">)</text:span></text:span><text:span text:style-name="Source_20_Text"><text:span text:style-name="T3"> </text:span></text:span><text:span text:style-name="Source_20_Text"><text:span text:style-name="T2">AS</text:span></text:span><text:span text:style-name="Source_20_Text"><text:span text:style-name="T3"> ticket_medio</text:span></text:span></text:p>
      <text:p text:style-name="P6"><text:span text:style-name="Source_20_Text"><text:span text:style-name="T2">FROM</text:span></text:span><text:span text:style-name="Source_20_Text"><text:span text:style-name="T3"> </text:span></text:span><text:span text:style-name="Source_20_Text"><text:span text:style-name="T5">(</text:span></text:span></text:p>
      <text:p text:style-name="P6"><text:span text:style-name="Source_20_Text"><text:span text:style-name="T6"><text:s text:c="4"/></text:span></text:span><text:span text:style-name="Source_20_Text"><text:span text:style-name="T2">SELECT</text:span></text:span><text:span text:style-name="Source_20_Text"><text:span text:style-name="T3"> </text:span></text:span><text:span text:style-name="Source_20_Text"><text:span text:style-name="T4">SUM</text:span></text:span><text:span text:style-name="Source_20_Text"><text:span text:style-name="T5">(</text:span></text:span><text:span text:style-name="Source_20_Text"><text:span text:style-name="T3">quantidade * preco_unit</text:span></text:span><text:span text:style-name="Source_20_Text"><text:span text:style-name="T5">)</text:span></text:span><text:span text:style-name="Source_20_Text"><text:span text:style-name="T3"> </text:span></text:span><text:span text:style-name="Source_20_Text"><text:span text:style-name="T2">AS</text:span></text:span><text:span text:style-name="Source_20_Text"><text:span text:style-name="T3"> valor_total</text:span></text:span></text:p>
      <text:p text:style-name="P6"><text:span text:style-name="Source_20_Text"><text:span text:style-name="T6"><text:s text:c="4"/></text:span></text:span><text:span text:style-name="Source_20_Text"><text:span text:style-name="T2">FROM</text:span></text:span><text:span text:style-name="Source_20_Text"><text:span text:style-name="T3"> itens_pedido</text:span></text:span></text:p>
      <text:p text:style-name="P6"><text:span text:style-name="Source_20_Text"><text:span text:style-name="T6"><text:s text:c="4"/></text:span></text:span><text:span text:style-name="Source_20_Text"><text:span text:style-name="T2">GROUP</text:span></text:span><text:span text:style-name="Source_20_Text"><text:span text:style-name="T3"> </text:span></text:span><text:span text:style-name="Source_20_Text"><text:span text:style-name="T2">BY</text:span></text:span><text:span text:style-name="Source_20_Text"><text:span text:style-name="T3"> pedido_id</text:span></text:span></text:p>
      <text:p text:style-name="P6"><text:span text:style-name="Source_20_Text"><text:span text:style-name="T5">)</text:span></text:span><text:span text:style-name="Source_20_Text"><text:span text:style-name="T3"> </text:span></text:span><text:span text:style-name="Source_20_Text"><text:span text:style-name="T2">AS</text:span></text:span><text:span text:style-name="Source_20_Text"><text:span text:style-name="T3"> totais_por_pedido</text:span></text:span><text:span text:style-name="Source_20_Text"><text:span text:style-name="T5">;</text:span></text:span></text:p>
      <text:p text:style-name="Text_20_body"><text:soft-page-break/>Esse último é uma <text:span text:style-name="Strong_20_Emphasis">subquery</text:span> — um <text:span text:style-name="Source_20_Text">SELECT</text:span> dentro de outro. Você calcula o total de cada pedido na subquery interna, e o <text:span text:style-name="Source_20_Text">SELECT</text:span> externo calcula a média desses totais. Subqueries são um tópico que aparece naturalmente quando as perguntas se tornam mais complexas.</text:p>
      <text:p text:style-name="P5">sql</text:p>
      <text:p text:style-name="P6"><text:span text:style-name="Source_20_Text"><text:span text:style-name="T1">-- Produto com maior valor em estoque</text:span></text:span></text:p>
      <text:p text:style-name="P6"><text:span text:style-name="Source_20_Text"><text:span text:style-name="T2">SELECT</text:span></text:span><text:span text:style-name="Source_20_Text"><text:span text:style-name="T3"> nome</text:span></text:span><text:span text:style-name="Source_20_Text"><text:span text:style-name="T5">,</text:span></text:span><text:span text:style-name="Source_20_Text"><text:span text:style-name="T3"> preco</text:span></text:span><text:span text:style-name="Source_20_Text"><text:span text:style-name="T5">,</text:span></text:span><text:span text:style-name="Source_20_Text"><text:span text:style-name="T3"> estoque</text:span></text:span><text:span text:style-name="Source_20_Text"><text:span text:style-name="T5">,</text:span></text:span></text:p>
      <text:p text:style-name="P6"><text:span text:style-name="Source_20_Text"><text:span text:style-name="T6"><text:s text:c="7"/></text:span></text:span><text:span text:style-name="Source_20_Text"><text:span text:style-name="T3">preco * estoque </text:span></text:span><text:span text:style-name="Source_20_Text"><text:span text:style-name="T2">AS</text:span></text:span><text:span text:style-name="Source_20_Text"><text:span text:style-name="T3"> valor_em_estoque</text:span></text:span></text:p>
      <text:p text:style-name="P6"><text:span text:style-name="Source_20_Text"><text:span text:style-name="T2">FROM</text:span></text:span><text:span text:style-name="Source_20_Text"><text:span text:style-name="T3"> produtos</text:span></text:span></text:p>
      <text:p text:style-name="P6"><text:span text:style-name="Source_20_Text"><text:span text:style-name="T2">ORDER</text:span></text:span><text:span text:style-name="Source_20_Text"><text:span text:style-name="T3"> </text:span></text:span><text:span text:style-name="Source_20_Text"><text:span text:style-name="T2">BY</text:span></text:span><text:span text:style-name="Source_20_Text"><text:span text:style-name="T3"> valor_em_estoque </text:span></text:span><text:span text:style-name="Source_20_Text"><text:span text:style-name="T2">DESC</text:span></text:span></text:p>
      <text:p text:style-name="P6"><text:span text:style-name="Source_20_Text"><text:span text:style-name="T2">LIMIT</text:span></text:span><text:span text:style-name="Source_20_Text"><text:span text:style-name="T3"> </text:span></text:span><text:span text:style-name="Source_20_Text"><text:span text:style-name="T8">1</text:span></text:span><text:span text:style-name="Source_20_Text"><text:span text:style-name="T5">;</text:span></text:span></text:p>
      <text:p text:style-name="P7"/>
      <text:p text:style-name="P6"><text:span text:style-name="Source_20_Text"><text:span text:style-name="T1">-- Clientes com mais de 1 pedido</text:span></text:span></text:p>
      <text:p text:style-name="P6"><text:span text:style-name="Source_20_Text"><text:span text:style-name="T2">SELECT</text:span></text:span><text:span text:style-name="Source_20_Text"><text:span text:style-name="T3"> cliente_id</text:span></text:span><text:span text:style-name="Source_20_Text"><text:span text:style-name="T5">,</text:span></text:span><text:span text:style-name="Source_20_Text"><text:span text:style-name="T3"> </text:span></text:span><text:span text:style-name="Source_20_Text"><text:span text:style-name="T4">COUNT</text:span></text:span><text:span text:style-name="Source_20_Text"><text:span text:style-name="T5">(</text:span></text:span><text:span text:style-name="Source_20_Text"><text:span text:style-name="T3">*</text:span></text:span><text:span text:style-name="Source_20_Text"><text:span text:style-name="T5">)</text:span></text:span><text:span text:style-name="Source_20_Text"><text:span text:style-name="T3"> </text:span></text:span><text:span text:style-name="Source_20_Text"><text:span text:style-name="T2">AS</text:span></text:span><text:span text:style-name="Source_20_Text"><text:span text:style-name="T3"> total_pedidos</text:span></text:span></text:p>
      <text:p text:style-name="P6"><text:span text:style-name="Source_20_Text"><text:span text:style-name="T2">FROM</text:span></text:span><text:span text:style-name="Source_20_Text"><text:span text:style-name="T3"> pedidos</text:span></text:span></text:p>
      <text:p text:style-name="P6"><text:span text:style-name="Source_20_Text"><text:span text:style-name="T2">GROUP</text:span></text:span><text:span text:style-name="Source_20_Text"><text:span text:style-name="T3"> </text:span></text:span><text:span text:style-name="Source_20_Text"><text:span text:style-name="T2">BY</text:span></text:span><text:span text:style-name="Source_20_Text"><text:span text:style-name="T3"> cliente_id</text:span></text:span></text:p>
      <text:p text:style-name="P6"><text:span text:style-name="Source_20_Text"><text:span text:style-name="T2">HAVING</text:span></text:span><text:span text:style-name="Source_20_Text"><text:span text:style-name="T3"> </text:span></text:span><text:span text:style-name="Source_20_Text"><text:span text:style-name="T4">COUNT</text:span></text:span><text:span text:style-name="Source_20_Text"><text:span text:style-name="T5">(</text:span></text:span><text:span text:style-name="Source_20_Text"><text:span text:style-name="T3">*</text:span></text:span><text:span text:style-name="Source_20_Text"><text:span text:style-name="T5">)</text:span></text:span><text:span text:style-name="Source_20_Text"><text:span text:style-name="T3"> &gt; </text:span></text:span><text:span text:style-name="Source_20_Text"><text:span text:style-name="T8">1</text:span></text:span><text:span text:style-name="Source_20_Text"><text:span text:style-name="T5">;</text:span></text:span></text:p>
      <text:p text:style-name="P2"/>
      <text:h text:style-name="P1" text:outline-level="3">11. Quando usar agregação</text:h>
      <text:p text:style-name="Text_20_body">A resposta prática: sempre que a pergunta contiver palavras como <text:span text:style-name="Strong_20_Emphasis">total</text:span>, <text:span text:style-name="Strong_20_Emphasis">média</text:span>, <text:span text:style-name="Strong_20_Emphasis">quantidade</text:span>, <text:span text:style-name="Strong_20_Emphasis">máximo</text:span>, <text:span text:style-name="Strong_20_Emphasis">mínimo</text:span>, <text:span text:style-name="Strong_20_Emphasis">por cliente</text:span>, <text:span text:style-name="Strong_20_Emphasis">por produto</text:span>, <text:span text:style-name="Strong_20_Emphasis">por mês</text:span>. Essas palavras sinalizam que você precisa de uma visão sumarizada — não de registros individuais.</text:p>
      <text:p text:style-name="Text_20_body">Em sistemas de e-commerce, dashboards analíticos, relatórios financeiros e qualquer funcionalidade que precise de estatísticas, <text:span text:style-name="Source_20_Text">GROUP BY</text:span> com funções de agregação é o mecanismo central. É um dos recursos SQL que mais diferencia um desenvolvedor backend capaz de um que só sabe fazer <text:span text:style-name="Source_20_Text">SELECT *</text:span>.</text:p>
      <text:p text:style-name="P2"/>
      <text:h text:style-name="P1" text:outline-level="3">Síntese da aula</text:h>
      <text:p text:style-name="Text_20_body">Funções de agregação — <text:span text:style-name="Source_20_Text">COUNT</text:span>, <text:span text:style-name="Source_20_Text">SUM</text:span>, <text:span text:style-name="Source_20_Text">AVG</text:span>, <text:span text:style-name="Source_20_Text">MAX</text:span>, <text:span text:style-name="Source_20_Text">MIN</text:span> — calculam um valor único sobre um conjunto de linhas. Sem <text:span text:style-name="Source_20_Text">GROUP BY</text:span>, operam sobre a tabela inteira. Com <text:span text:style-name="Source_20_Text">GROUP BY</text:span>, operam sobre subconjuntos definidos pelos valores distintos das colunas agrupadas.</text:p>
      <text:p text:style-name="Text_20_body">A regra fundamental: toda coluna no <text:span text:style-name="Source_20_Text">SELECT</text:span> fora de uma agregação deve estar no <text:span text:style-name="Source_20_Text">GROUP BY</text:span>. <text:span text:style-name="Source_20_Text">WHERE</text:span> filtra linhas antes do agrupamento. <text:span text:style-name="Source_20_Text">HAVING</text:span> filtra grupos depois do agrupamento — é o único lugar onde funções de agregação podem aparecer como filtro. <text:span text:style-name="Source_20_Text">ORDER BY</text:span> pode ordenar pelo resultado de agregações e é executado por último.</text:p>
      <text:p text:style-name="Text_20_body">Amanhã você estuda <text:span text:style-name="Source_20_Text">JOIN</text:span> — o comando que finalmente une tabelas relacionadas e permite consultas que cruzam múltiplas entidades, como montar a nota fiscal completa de um pedido com nome do cliente, produtos e valores calculados.</text:p>
      <text:p text:style-name="Text_20_body"/>
      <text:h text:style-name="P8" text:outline-level="1"><text:soft-page-break/>Aula — Semana 3, Quinta-feira</text:h>
      <text:h text:style-name="P9" text:outline-level="2">JOIN — Unindo Tabelas Relacionadas</text:h>
      <text:p text:style-name="P2"/>
      <text:h text:style-name="P9" text:outline-level="2">1. Por que o JOIN existe</text:h>
      <text:p text:style-name="Text_20_body">Você modelou o banco em tabelas separadas por uma razão fundamental: <text:span text:style-name="Strong_20_Emphasis">evitar redundância</text:span>. O nome do cliente não fica repetido em cada pedido — fica em <text:span text:style-name="Source_20_Text">clientes</text:span> uma única vez, e <text:span text:style-name="Source_20_Text">pedidos</text:span> referencia esse cliente pelo <text:span text:style-name="Source_20_Text">id</text:span>.</text:p>
      <text:p text:style-name="Text_20_body">Essa separação é correta e necessária. Mas cria uma consequência: para responder perguntas que cruzam múltiplas entidades — "qual cliente fez qual pedido?" ou "quais produtos estão no pedido 1?" — você precisa de um mecanismo que <text:span text:style-name="Strong_20_Emphasis">una essas tabelas no momento da consulta</text:span>.</text:p>
      <text:p text:style-name="Text_20_body">Esse mecanismo é o <text:span text:style-name="Source_20_Text">JOIN</text:span>.</text:p>
      <text:p text:style-name="Text_20_body">O <text:span text:style-name="Source_20_Text">JOIN</text:span> não existe apesar da separação em tabelas — ele existe <text:span text:style-name="Strong_20_Emphasis">por causa</text:span> dela. É o complemento natural da modelagem relacional. Você separa os dados para armazená-los sem redundância, e usa <text:span text:style-name="Source_20_Text">JOIN</text:span> para reuni-los quando precisar consultá-los.</text:p>
      <text:p text:style-name="P2"/>
      <text:h text:style-name="P9" text:outline-level="2">2. O conceito antes da sintaxe</text:h>
      <text:p text:style-name="Text_20_body">Antes de ver qualquer SQL, entenda o que o <text:span text:style-name="Source_20_Text">JOIN</text:span> faz conceitualmente.</text:p>
      <text:p text:style-name="Text_20_body">Imagine duas tabelas lado a lado:</text:p>
      <text:p text:style-name="P10"><text:span text:style-name="Source_20_Text">clientes <text:s text:c="19"/>pedidos</text:span></text:p>
      <text:p text:style-name="P10"><text:span text:style-name="Source_20_Text">--------- <text:s text:c="18"/>--------</text:span></text:p>
      <text:p text:style-name="P10"><text:span text:style-name="Source_20_Text">id | nome <text:s text:c="18"/>id | cliente_id | data</text:span></text:p>
      <text:p text:style-name="P10"><text:span text:style-name="Source_20_Text">---|-------- <text:s text:c="15"/>---|------------|-----</text:span></text:p>
      <text:p text:style-name="P10"><text:span text:style-name="Source_20_Text">1 <text:s/>| Ana <text:s text:c="19"/>1 <text:s/>| 1 <text:s text:c="9"/>| 2026-06-01</text:span></text:p>
      <text:p text:style-name="P10"><text:span text:style-name="Source_20_Text">2 <text:s/>| Bruno <text:s text:c="17"/>2 <text:s/>| 1 <text:s text:c="9"/>| 2026-06-03</text:span></text:p>
      <text:p text:style-name="P10"><text:span text:style-name="Source_20_Text">3 <text:s/>| Carla <text:s text:c="17"/>3 <text:s/>| 2 <text:s text:c="9"/>| 2026-06-05</text:span></text:p>
      <text:p text:style-name="Text_20_body">O <text:span text:style-name="Source_20_Text">JOIN</text:span> une essas duas tabelas usando a relação entre <text:span text:style-name="Source_20_Text">clientes.id</text:span> e <text:span text:style-name="Source_20_Text">pedidos.cliente_id</text:span>. Para cada linha de <text:span text:style-name="Source_20_Text">pedidos</text:span>, ele encontra a linha correspondente em <text:span text:style-name="Source_20_Text">clientes</text:span> onde <text:span text:style-name="Source_20_Text">clientes.id = pedidos.cliente_id</text:span>, e combina as duas em uma linha só:</text:p>
      <text:p text:style-name="P10"><text:span text:style-name="Source_20_Text">id_pedido | cliente_id | data <text:s text:c="6"/>| id_cliente | nome</text:span></text:p>
      <text:p text:style-name="P10"><text:span text:style-name="Source_20_Text">----------|------------|------------|------------|------</text:span></text:p>
      <text:p text:style-name="P10"><text:span text:style-name="Source_20_Text">1 <text:s text:c="8"/>| 1 <text:s text:c="9"/>| 2026-06-01 | 1 <text:s text:c="9"/>| Ana</text:span></text:p>
      <text:p text:style-name="P10"><text:span text:style-name="Source_20_Text">2 <text:s text:c="8"/>| 1 <text:s text:c="9"/>| 2026-06-03 | 1 <text:s text:c="9"/>| Ana</text:span></text:p>
      <text:p text:style-name="P10"><text:span text:style-name="Source_20_Text">3 <text:s text:c="8"/>| 2 <text:s text:c="9"/>| 2026-06-05 | 2 <text:s text:c="9"/>| Bruno</text:span></text:p>
      <text:p text:style-name="Text_20_body"><text:soft-page-break/>Carla não aparece porque não tem pedidos. O que aparece e o que não aparece depende do <text:span text:style-name="Strong_20_Emphasis">tipo de JOIN</text:span> — que é o coração desta aula.</text:p>
      <text:p text:style-name="P2"/>
      <text:h text:style-name="P9" text:outline-level="2">3. INNER JOIN — A interseção</text:h>
      <text:p text:style-name="Text_20_body">O <text:span text:style-name="Source_20_Text">INNER JOIN</text:span> retorna apenas as linhas que têm correspondência <text:span text:style-name="Strong_20_Emphasis">em ambas as tabelas</text:span>. É o tipo de JOIN mais comum e o padrão quando você escreve só <text:span text:style-name="Source_20_Text">JOIN</text:span> sem qualificador.</text:p>
      <text:p text:style-name="P10"><text:span text:style-name="Source_20_Text">SELECT</text:span></text:p>
      <text:p text:style-name="P10"><text:span text:style-name="Source_20_Text"><text:s text:c="4"/>p.id <text:s text:c="9"/>AS pedido_id,</text:span></text:p>
      <text:p text:style-name="P10"><text:span text:style-name="Source_20_Text"><text:s text:c="4"/>c.nome <text:s text:c="7"/>AS cliente,</text:span></text:p>
      <text:p text:style-name="P10"><text:span text:style-name="Source_20_Text"><text:s text:c="4"/>p.data</text:span></text:p>
      <text:p text:style-name="P10"><text:span text:style-name="Source_20_Text">FROM pedidos p</text:span></text:p>
      <text:p text:style-name="P10"><text:span text:style-name="Source_20_Text">INNER JOIN clientes c ON p.cliente_id = c.id;</text:span></text:p>
      <text:p text:style-name="P10"><text:span text:style-name="Source_20_Text">pedido_id | cliente | data</text:span></text:p>
      <text:p text:style-name="P10"><text:span text:style-name="Source_20_Text">----------|---------|---------------------</text:span></text:p>
      <text:p text:style-name="P10"><text:span text:style-name="Source_20_Text">1 <text:s text:c="8"/>| Ana <text:s text:c="4"/>| 2026-06-01 00:00:00</text:span></text:p>
      <text:p text:style-name="P10"><text:span text:style-name="Source_20_Text">2 <text:s text:c="8"/>| Ana <text:s text:c="4"/>| 2026-06-03 00:00:00</text:span></text:p>
      <text:p text:style-name="P10"><text:span text:style-name="Source_20_Text">3 <text:s text:c="8"/>| Bruno <text:s text:c="2"/>| 2026-06-05 00:00:00</text:span></text:p>
      <text:p text:style-name="Text_20_body">Carla não aparece — ela não tem pedidos, então não há correspondência na tabela <text:span text:style-name="Source_20_Text">pedidos</text:span>. O <text:span text:style-name="Source_20_Text">INNER JOIN</text:span> exige correspondência nos dois lados.</text:p>
      <text:p text:style-name="Text_20_body">Observe dois detalhes na sintaxe:</text:p>
      <text:p text:style-name="Text_20_body"><text:span text:style-name="Strong_20_Emphasis">Aliases de tabela.</text:span> <text:span text:style-name="Source_20_Text">FROM pedidos p</text:span> define <text:span text:style-name="Source_20_Text">p</text:span> como alias para <text:span text:style-name="Source_20_Text">pedidos</text:span>. <text:span text:style-name="Source_20_Text">INNER JOIN clientes c</text:span> define <text:span text:style-name="Source_20_Text">c</text:span> como alias para <text:span text:style-name="Source_20_Text">clientes</text:span>. Depois você usa <text:span text:style-name="Source_20_Text">p.id</text:span>, <text:span text:style-name="Source_20_Text">c.nome</text:span> em vez de <text:span text:style-name="Source_20_Text">pedidos.id</text:span>, <text:span text:style-name="Source_20_Text">clientes.nome</text:span>. Em queries com múltiplas tabelas, aliases são essenciais para legibilidade e para resolver ambiguidade quando duas tabelas têm colunas com o mesmo nome.</text:p>
      <text:p text:style-name="Text_20_body"><text:span text:style-name="Strong_20_Emphasis">A cláusula ON.</text:span> <text:span text:style-name="Source_20_Text">ON p.cliente_id = c.id</text:span> é a <text:span text:style-name="Strong_20_Emphasis">condição de junção</text:span> — a regra que define como as linhas das duas tabelas se correspondem. Quase sempre é a FK de uma tabela igual à PK da outra. Se você esquecer o <text:span text:style-name="Source_20_Text">ON</text:span>, o banco fará um produto cartesiano — cada linha de uma tabela combinada com cada linha da outra — gerando um resultado explosivo e inútil.</text:p>
      <text:p text:style-name="P2"/>
      <text:h text:style-name="P9" text:outline-level="2">4. LEFT JOIN — Preservando o lado esquerdo</text:h>
      <text:p text:style-name="Text_20_body">O <text:span text:style-name="Source_20_Text">LEFT JOIN</text:span> retorna <text:span text:style-name="Strong_20_Emphasis">todas as linhas da tabela da esquerda</text:span> (a do <text:span text:style-name="Source_20_Text">FROM</text:span>), com os dados da tabela da direita quando há correspondência — e <text:span text:style-name="Source_20_Text">NULL</text:span> quando não há.</text:p>
      <text:p text:style-name="P10"><text:span text:style-name="Source_20_Text">SELECT</text:span></text:p>
      <text:p text:style-name="P10"><text:span text:style-name="Source_20_Text"><text:s text:c="4"/>c.nome <text:s text:c="7"/>AS cliente,</text:span></text:p>
      <text:p text:style-name="P10"><text:span text:style-name="Source_20_Text"><text:s text:c="4"/>p.id <text:s text:c="9"/>AS pedido_id,</text:span></text:p>
      <text:p text:style-name="P10"><text:span text:style-name="Source_20_Text"><text:s text:c="4"/>p.data</text:span></text:p>
      <text:p text:style-name="P10"><text:soft-page-break/><text:span text:style-name="Source_20_Text">FROM clientes c</text:span></text:p>
      <text:p text:style-name="P10"><text:span text:style-name="Source_20_Text">LEFT JOIN pedidos p ON c.id = p.cliente_id;</text:span></text:p>
      <text:p text:style-name="P10"><text:span text:style-name="Source_20_Text">cliente | pedido_id | data</text:span></text:p>
      <text:p text:style-name="P10"><text:span text:style-name="Source_20_Text">--------|-----------|---------------------</text:span></text:p>
      <text:p text:style-name="P10"><text:span text:style-name="Source_20_Text">Ana <text:s text:c="4"/>| 1 <text:s text:c="8"/>| 2026-06-01 00:00:00</text:span></text:p>
      <text:p text:style-name="P10"><text:span text:style-name="Source_20_Text">Ana <text:s text:c="4"/>| 2 <text:s text:c="8"/>| 2026-06-03 00:00:00</text:span></text:p>
      <text:p text:style-name="P10"><text:span text:style-name="Source_20_Text">Bruno <text:s text:c="2"/>| 3 <text:s text:c="8"/>| 2026-06-05 00:00:00</text:span></text:p>
      <text:p text:style-name="P10"><text:span text:style-name="Source_20_Text">Carla <text:s text:c="2"/>| NULL <text:s text:c="5"/>| NULL</text:span></text:p>
      <text:p text:style-name="Text_20_body">Agora Carla aparece — porque ela está na tabela da esquerda (<text:span text:style-name="Source_20_Text">clientes</text:span>). Como ela não tem pedidos, as colunas de <text:span text:style-name="Source_20_Text">pedidos</text:span> ficam <text:span text:style-name="Source_20_Text">NULL</text:span>.</text:p>
      <text:p text:style-name="Text_20_body">Isso é poderoso para responder perguntas como <text:span text:style-name="Strong_20_Emphasis">"quais clientes nunca fizeram um pedido?"</text:span>:</text:p>
      <text:p text:style-name="P10"><text:span text:style-name="Source_20_Text">SELECT c.nome</text:span></text:p>
      <text:p text:style-name="P10"><text:span text:style-name="Source_20_Text">FROM clientes c</text:span></text:p>
      <text:p text:style-name="P10"><text:span text:style-name="Source_20_Text">LEFT JOIN pedidos p ON c.id = p.cliente_id</text:span></text:p>
      <text:p text:style-name="P10"><text:span text:style-name="Source_20_Text">WHERE p.id IS NULL;</text:span></text:p>
      <text:p text:style-name="Text_20_body">A lógica: o <text:span text:style-name="Source_20_Text">LEFT JOIN</text:span> traz todos os clientes. O <text:span text:style-name="Source_20_Text">WHERE p.id IS NULL</text:span> filtra apenas os que não têm correspondência em <text:span text:style-name="Source_20_Text">pedidos</text:span> — ou seja, os que nunca compraram. Esse padrão <text:span text:style-name="Source_20_Text">LEFT JOIN + IS NULL</text:span> é uma das técnicas mais úteis do SQL para encontrar ausências.</text:p>
      <text:p text:style-name="P2"/>
      <text:h text:style-name="P9" text:outline-level="2">5. RIGHT JOIN — Preservando o lado direito</text:h>
      <text:p text:style-name="Text_20_body">O <text:span text:style-name="Source_20_Text">RIGHT JOIN</text:span> é o espelho do <text:span text:style-name="Source_20_Text">LEFT JOIN</text:span> — retorna todas as linhas da tabela da <text:span text:style-name="Strong_20_Emphasis">direita</text:span>, com <text:span text:style-name="Source_20_Text">NULL</text:span> quando não há correspondência na esquerda.</text:p>
      <text:p text:style-name="P10"><text:span text:style-name="Source_20_Text">SELECT</text:span></text:p>
      <text:p text:style-name="P10"><text:span text:style-name="Source_20_Text"><text:s text:c="4"/>c.nome <text:s text:c="7"/>AS cliente,</text:span></text:p>
      <text:p text:style-name="P10"><text:span text:style-name="Source_20_Text"><text:s text:c="4"/>p.id <text:s text:c="9"/>AS pedido_id</text:span></text:p>
      <text:p text:style-name="P10"><text:span text:style-name="Source_20_Text">FROM clientes c</text:span></text:p>
      <text:p text:style-name="P10"><text:span text:style-name="Source_20_Text">RIGHT JOIN pedidos p ON c.id = p.cliente_id;</text:span></text:p>
      <text:p text:style-name="Text_20_body">Na prática, <text:span text:style-name="Source_20_Text">RIGHT JOIN</text:span> é raramente usado. Qualquer <text:span text:style-name="Source_20_Text">RIGHT JOIN</text:span> pode ser reescrito como <text:span text:style-name="Source_20_Text">LEFT JOIN</text:span> trocando a ordem das tabelas — e a convenção é sempre usar <text:span text:style-name="Source_20_Text">LEFT JOIN</text:span> para consistência e legibilidade. Se você ver <text:span text:style-name="Source_20_Text">RIGHT JOIN</text:span> em código de produção, provavelmente é código legado ou de alguém que não seguiu a convenção.</text:p>
      <text:p text:style-name="P2"/>
      <text:h text:style-name="P9" text:outline-level="2">6. FULL OUTER JOIN — União completa</text:h>
      <text:p text:style-name="Text_20_body">O <text:span text:style-name="Source_20_Text">FULL OUTER JOIN</text:span> retorna <text:span text:style-name="Strong_20_Emphasis">todas as linhas de ambas as tabelas</text:span>, com <text:span text:style-name="Source_20_Text">NULL</text:span> nos lados sem correspondência.</text:p>
      <text:p text:style-name="P10"><text:span text:style-name="Source_20_Text">SELECT</text:span></text:p>
      <text:p text:style-name="P10"><text:soft-page-break/><text:span text:style-name="Source_20_Text"><text:s text:c="4"/>c.nome <text:s text:c="4"/>AS cliente,</text:span></text:p>
      <text:p text:style-name="P10"><text:span text:style-name="Source_20_Text"><text:s text:c="4"/>p.id <text:s text:c="6"/>AS pedido_id</text:span></text:p>
      <text:p text:style-name="P10"><text:span text:style-name="Source_20_Text">FROM clientes c</text:span></text:p>
      <text:p text:style-name="P10"><text:span text:style-name="Source_20_Text">FULL OUTER JOIN pedidos p ON c.id = p.cliente_id;</text:span></text:p>
      <text:p text:style-name="Text_20_body">Retorna clientes sem pedidos (com <text:span text:style-name="Source_20_Text">pedido_id NULL</text:span>) e pedidos sem cliente (com <text:span text:style-name="Source_20_Text">cliente NULL</text:span>, se houvesse). É útil para auditorias e para encontrar inconsistências nos dados — linhas que deveriam ter correspondência mas não têm.</text:p>
      <text:p text:style-name="Text_20_body"><text:span text:style-name="Source_20_Text">FULL OUTER JOIN</text:span> não existe no MySQL — é necessário simulá-lo com <text:span text:style-name="Source_20_Text">UNION</text:span> de um <text:span text:style-name="Source_20_Text">LEFT JOIN</text:span> e um <text:span text:style-name="Source_20_Text">RIGHT JOIN</text:span>. No PostgreSQL funciona nativamente.</text:p>
      <text:p text:style-name="P2"/>
      <text:h text:style-name="P9" text:outline-level="2">7. Visualizando os tipos de JOIN</text:h>
      <text:p text:style-name="Text_20_body">A forma mais clara de entender a diferença entre os tipos:</text:p>
      <text:p text:style-name="P10"><text:span text:style-name="Source_20_Text">Tabela A <text:s text:c="7"/>Tabela B</text:span></text:p>
      <text:p text:style-name="P10"><text:span text:style-name="Source_20_Text"><text:s text:c="3"/>[ <text:s/>A <text:s/>| <text:s/>AB <text:s/>| <text:s/>B <text:s/>]</text:span></text:p>
      <text:p text:style-name="P10"/>
      <text:p text:style-name="P10"><text:span text:style-name="Source_20_Text">INNER JOIN <text:s/>→ <text:s text:c="5"/>[AB] <text:s text:c="9"/>só a interseção</text:span></text:p>
      <text:p text:style-name="P10"><text:span text:style-name="Source_20_Text">LEFT JOIN <text:s text:c="2"/>→ <text:s text:c="2"/>[A][AB] <text:s text:c="9"/>tudo de A + interseção</text:span></text:p>
      <text:p text:style-name="P10"><text:span text:style-name="Source_20_Text">RIGHT JOIN <text:s/>→ <text:s text:c="5"/>[AB][B] <text:s text:c="6"/>interseção + tudo de B</text:span></text:p>
      <text:p text:style-name="P10"><text:span text:style-name="Source_20_Text">FULL JOIN <text:s text:c="2"/>→ <text:s text:c="2"/>[A][AB][B] <text:s text:c="6"/>tudo de ambos</text:span></text:p>
      <text:p text:style-name="P2"/>
      <text:h text:style-name="P9" text:outline-level="2">8. JOIN com múltiplas tabelas</text:h>
      <text:p text:style-name="Text_20_body">Você pode encadear múltiplos JOINs na mesma query. Cada <text:span text:style-name="Source_20_Text">JOIN</text:span> adiciona uma tabela à consulta, usando a mesma lógica de condição <text:span text:style-name="Source_20_Text">ON</text:span>.</text:p>
      <text:p text:style-name="Text_20_body">Para montar a nota fiscal completa de um pedido — cliente, produtos, quantidades e valores:</text:p>
      <text:p text:style-name="P10"><text:span text:style-name="Source_20_Text">SELECT</text:span></text:p>
      <text:p text:style-name="P10"><text:span text:style-name="Source_20_Text"><text:s text:c="4"/>c.nome <text:s text:c="29"/>AS cliente,</text:span></text:p>
      <text:p text:style-name="P10"><text:span text:style-name="Source_20_Text"><text:s text:c="4"/>p.id <text:s text:c="31"/>AS pedido_id,</text:span></text:p>
      <text:p text:style-name="P10"><text:span text:style-name="Source_20_Text"><text:s text:c="4"/>p.data,</text:span></text:p>
      <text:p text:style-name="P10"><text:span text:style-name="Source_20_Text"><text:s text:c="4"/>pr.nome <text:s text:c="28"/>AS produto,</text:span></text:p>
      <text:p text:style-name="P10"><text:span text:style-name="Source_20_Text"><text:s text:c="4"/>ip.quantidade,</text:span></text:p>
      <text:p text:style-name="P10"><text:span text:style-name="Source_20_Text"><text:s text:c="4"/>ip.preco_unit,</text:span></text:p>
      <text:p text:style-name="P10"><text:span text:style-name="Source_20_Text"><text:s text:c="4"/>ip.quantidade * ip.preco_unit <text:s text:c="6"/>AS subtotal</text:span></text:p>
      <text:p text:style-name="P10"><text:span text:style-name="Source_20_Text">FROM pedidos p</text:span></text:p>
      <text:p text:style-name="P10"><text:span text:style-name="Source_20_Text">INNER JOIN clientes c <text:s text:c="4"/>ON p.cliente_id <text:s/>= c.id</text:span></text:p>
      <text:p text:style-name="P10"><text:span text:style-name="Source_20_Text">INNER JOIN itens_pedido ip ON p.id <text:s text:c="8"/>= ip.pedido_id</text:span></text:p>
      <text:p text:style-name="P10"><text:span text:style-name="Source_20_Text">INNER JOIN produtos pr <text:s text:c="3"/>ON ip.produto_id = pr.id</text:span></text:p>
      <text:p text:style-name="P10"><text:soft-page-break/><text:span text:style-name="Source_20_Text">WHERE p.id = 1;</text:span></text:p>
      <text:p text:style-name="P10"><text:span text:style-name="Source_20_Text">cliente | pedido_id | data <text:s text:c="6"/>| produto <text:s text:c="7"/>| qtd | preco_unit | subtotal</text:span></text:p>
      <text:p text:style-name="P10"><text:span text:style-name="Source_20_Text">--------|-----------|------------|----------------|-----|------------|--------</text:span></text:p>
      <text:p text:style-name="P10"><text:span text:style-name="Source_20_Text">Ana <text:s text:c="4"/>| 1 <text:s text:c="8"/>| 2026-06-01 | Fone de Ouvido | 2 <text:s text:c="2"/>| 150.00 <text:s text:c="4"/>| 300.00</text:span></text:p>
      <text:p text:style-name="P10"><text:span text:style-name="Source_20_Text">Ana <text:s text:c="4"/>| 1 <text:s text:c="8"/>| 2026-06-01 | Cabo USB <text:s text:c="6"/>| 1 <text:s text:c="2"/>| <text:s/>30.00 <text:s text:c="4"/>| <text:s/>30.00</text:span></text:p>
      <text:p text:style-name="Text_20_body">Esse é o resultado que você visualizou conceitualmente quando estudou a tabela <text:span text:style-name="Source_20_Text">itens_pedido</text:span> — agora em SQL real. Quatro tabelas unidas por três JOINs, produzindo exatamente os dados de uma nota fiscal.</text:p>
      <text:p text:style-name="P2"/>
      <text:h text:style-name="P9" text:outline-level="2">9. JOIN com GROUP BY e agregação</text:h>
      <text:p text:style-name="Text_20_body">JOINs e agregação se combinam naturalmente para responder perguntas analíticas complexas:</text:p>
      <text:p text:style-name="P10"><text:span text:style-name="Source_20_Text">-- Total gasto por cliente</text:span></text:p>
      <text:p text:style-name="P10"><text:span text:style-name="Source_20_Text">SELECT</text:span></text:p>
      <text:p text:style-name="P10"><text:span text:style-name="Source_20_Text"><text:s text:c="4"/>c.nome <text:s text:c="29"/>AS cliente,</text:span></text:p>
      <text:p text:style-name="P10"><text:span text:style-name="Source_20_Text"><text:s text:c="4"/>COUNT(DISTINCT p.id) <text:s text:c="15"/>AS total_pedidos,</text:span></text:p>
      <text:p text:style-name="P10"><text:span text:style-name="Source_20_Text"><text:s text:c="4"/>SUM(ip.quantidade * ip.preco_unit) <text:s/>AS total_gasto</text:span></text:p>
      <text:p text:style-name="P10"><text:span text:style-name="Source_20_Text">FROM clientes c</text:span></text:p>
      <text:p text:style-name="P10"><text:span text:style-name="Source_20_Text">INNER JOIN pedidos p <text:s text:c="5"/>ON c.id <text:s/>= p.cliente_id</text:span></text:p>
      <text:p text:style-name="P10"><text:span text:style-name="Source_20_Text">INNER JOIN itens_pedido ip ON p.id = ip.pedido_id</text:span></text:p>
      <text:p text:style-name="P10"><text:span text:style-name="Source_20_Text">GROUP BY c.id, c.nome</text:span></text:p>
      <text:p text:style-name="P10"><text:span text:style-name="Source_20_Text">ORDER BY total_gasto DESC;</text:span></text:p>
      <text:p text:style-name="P10"><text:span text:style-name="Source_20_Text">cliente | total_pedidos | total_gasto</text:span></text:p>
      <text:p text:style-name="P10"><text:span text:style-name="Source_20_Text">--------|---------------|------------</text:span></text:p>
      <text:p text:style-name="P10"><text:span text:style-name="Source_20_Text">Ana <text:s text:c="4"/>| 2 <text:s text:c="12"/>| 465.00</text:span></text:p>
      <text:p text:style-name="P10"><text:span text:style-name="Source_20_Text">Bruno <text:s text:c="2"/>| 1 <text:s text:c="12"/>| 530.00</text:span></text:p>
      <text:p text:style-name="Text_20_body">Observe o <text:span text:style-name="Source_20_Text">COUNT(DISTINCT p.id)</text:span> — conta pedidos únicos, não linhas. Se você usasse <text:span text:style-name="Source_20_Text">COUNT(*)</text:span>, contaria cada item como um pedido separado — resultado errado. <text:span text:style-name="Source_20_Text">DISTINCT</text:span> dentro de <text:span text:style-name="Source_20_Text">COUNT</text:span> é um padrão importante: conte valores únicos, não todas as ocorrências.</text:p>
      <text:p text:style-name="P2"/>
      <text:h text:style-name="P9" text:outline-level="2">10. O produto cartesiano — O erro que você deve evitar</text:h>
      <text:p text:style-name="Text_20_body">Se você esquecer o <text:span text:style-name="Source_20_Text">ON</text:span> num <text:span text:style-name="Source_20_Text">JOIN</text:span>, ou usar a sintaxe antiga de join com vírgula na cláusula <text:span text:style-name="Source_20_Text">FROM</text:span>, o banco produz um <text:span text:style-name="Strong_20_Emphasis">produto cartesiano</text:span>: cada linha de uma tabela combinada com cada linha da outra.</text:p>
      <text:p text:style-name="P10"><text:span text:style-name="Source_20_Text">-- Sintaxe antiga (nunca use)</text:span></text:p>
      <text:p text:style-name="P10"><text:span text:style-name="Source_20_Text">SELECT * FROM clientes, pedidos;</text:span></text:p>
      <text:p text:style-name="P10"/>
      <text:p text:style-name="P10"><text:soft-page-break/><text:span text:style-name="Source_20_Text">-- Equivale a um CROSS JOIN sem condição</text:span></text:p>
      <text:p text:style-name="P10"><text:span text:style-name="Source_20_Text">SELECT * FROM clientes CROSS JOIN pedidos;</text:span></text:p>
      <text:p text:style-name="Text_20_body">Com 3 clientes e 3 pedidos, o resultado tem 3 × 3 = 9 linhas. Com 1000 clientes e 10000 pedidos, o resultado tem 10 milhões de linhas. Em tabelas grandes, isso pode derrubar o banco.</text:p>
      <text:p text:style-name="Text_20_body">O produto cartesiano tem usos legítimos e específicos — gerar combinações, preencher matrizes. Mas na esmagadora maioria dos casos é um erro. O sintoma é um resultado com muito mais linhas do que o esperado — é o primeiro lugar para olhar quando um JOIN retorna números absurdos.</text:p>
      <text:p text:style-name="P2"/>
      <text:h text:style-name="P9" text:outline-level="2">11. Por que JOIN é um divisor de águas em SQL</text:h>
      <text:p text:style-name="Text_20_body">Antes do <text:span text:style-name="Source_20_Text">JOIN</text:span>, você sabia fazer perguntas sobre uma tabela por vez. Com <text:span text:style-name="Source_20_Text">JOIN</text:span>, você sabe fazer perguntas sobre o <text:span text:style-name="Strong_20_Emphasis">sistema inteiro</text:span> — cruzando dados de múltiplas entidades relacionadas.</text:p>
      <text:p text:style-name="Text_20_body">Essa é a diferença entre "me dê os pedidos" e "me dê os pedidos com o nome do cliente, os produtos comprados, as quantidades e o total gasto por cliente no último mês ordenado do maior para o menor". A segunda pergunta é uma query de produção real — e você agora tem todas as ferramentas para escrevê-la.</text:p>
      <text:p text:style-name="P10"><text:span text:style-name="Source_20_Text">-- Consulta analítica completa da loja</text:span></text:p>
      <text:p text:style-name="P10"><text:span text:style-name="Source_20_Text">SELECT</text:span></text:p>
      <text:p text:style-name="P10"><text:span text:style-name="Source_20_Text"><text:s text:c="4"/>c.nome <text:s text:c="33"/>AS cliente,</text:span></text:p>
      <text:p text:style-name="P10"><text:span text:style-name="Source_20_Text"><text:s text:c="4"/>COUNT(DISTINCT p.id) <text:s text:c="19"/>AS total_pedidos,</text:span></text:p>
      <text:p text:style-name="P10"><text:span text:style-name="Source_20_Text"><text:s text:c="4"/>SUM(ip.quantidade * ip.preco_unit) <text:s text:c="5"/>AS total_gasto,</text:span></text:p>
      <text:p text:style-name="P10"><text:span text:style-name="Source_20_Text"><text:s text:c="4"/>MAX(p.data) <text:s text:c="28"/>AS ultimo_pedido</text:span></text:p>
      <text:p text:style-name="P10"><text:span text:style-name="Source_20_Text">FROM clientes c</text:span></text:p>
      <text:p text:style-name="P10"><text:span text:style-name="Source_20_Text">LEFT JOIN pedidos p <text:s text:c="6"/>ON c.id <text:s/>= p.cliente_id</text:span></text:p>
      <text:p text:style-name="P10"><text:span text:style-name="Source_20_Text">LEFT JOIN itens_pedido ip ON p.id <text:s/>= ip.pedido_id</text:span></text:p>
      <text:p text:style-name="P10"><text:span text:style-name="Source_20_Text">GROUP BY c.id, c.nome</text:span></text:p>
      <text:p text:style-name="P10"><text:span text:style-name="Source_20_Text">ORDER BY total_gasto DESC NULLS LAST;</text:span></text:p>
      <text:p text:style-name="Text_20_body">O <text:span text:style-name="Source_20_Text">LEFT JOIN</text:span> aqui garante que Carla aparece mesmo sem pedidos — com <text:span text:style-name="Source_20_Text">total_pedidos = 0</text:span> e <text:span text:style-name="Source_20_Text">total_gasto = NULL</text:span>. O <text:span text:style-name="Source_20_Text">NULLS LAST</text:span> no <text:span text:style-name="Source_20_Text">ORDER BY</text:span> a coloca no final da lista em vez do início.</text:p>
      <text:p text:style-name="P2"/>
      <text:h text:style-name="P9" text:outline-level="2">Síntese da aula</text:h>
      <text:p text:style-name="Text_20_body"><text:span text:style-name="Source_20_Text">JOIN</text:span> une tabelas no momento da consulta usando a relação entre FK e PK definida na modelagem. <text:span text:style-name="Source_20_Text">INNER JOIN</text:span> retorna apenas linhas com correspondência em ambos os lados. <text:span text:style-name="Source_20_Text">LEFT JOIN</text:span> preserva todas as linhas da tabela esquerda, preenchendo com <text:span text:style-name="Source_20_Text">NULL</text:span> onde não há correspondência — base do padrão <text:span text:style-name="Source_20_Text">LEFT JOIN + IS NULL</text:span> para encontrar ausências.</text:p>
      <text:p text:style-name="Text_20_body">Múltiplos JOINs encadeados permitem cruzar quantas tabelas forem necessárias numa única query. Combinado com <text:span text:style-name="Source_20_Text">GROUP BY</text:span> e agregações, o <text:span text:style-name="Source_20_Text">JOIN</text:span> transforma o banco numa ferramenta analítica <text:soft-page-break/>completa — capaz de responder perguntas complexas sobre o sistema inteiro em uma única consulta.</text:p>
      <text:p text:style-name="Text_20_body"><text:span text:style-name="Source_20_Text">JOIN</text:span> é o divisor de águas em SQL porque é o ponto onde modelagem relacional, integridade referencial e consultas se unem em algo coerente e poderoso. Tudo que você aprendeu nas últimas três semanas converge aqui.</text:p>
      <text:p text:style-name="Text_20_body">Amanhã é a revisão de consolidação da Semana 3 — onde você amarra <text:span text:style-name="Source_20_Text">UPDATE</text:span>, <text:span text:style-name="Source_20_Text">DELETE</text:span>, <text:span text:style-name="Source_20_Text">ORDER BY</text:span>, <text:span text:style-name="Source_20_Text">GROUP BY</text:span> e <text:span text:style-name="Source_20_Text">JOIN</text:span> numa visão integrada antes de entrar na Semana 4 e fechar o módulo.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Line_20_numbering" style:display-name="Line numbering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0T20:56:24.500739100</meta:creation-date>
    <dc:date>2026-06-12T21:10:50.264982100</dc:date>
    <meta:editing-duration>PT2H19M30S</meta:editing-duration>
    <meta:editing-cycles>3</meta:editing-cycles>
    <meta:generator>LibreOffice/25.8.6.2$Windows_X86_64 LibreOffice_project/b4b39682cd9868fa725bc664aff94278d315bd04</meta:generator>
    <meta:document-statistic meta:table-count="0" meta:image-count="0" meta:object-count="0" meta:page-count="14" meta:paragraph-count="341" meta:word-count="3394" meta:character-count="21095" meta:non-whitespace-character-count="16962"/>
  </office:meta>
</office:document-meta>
</file>