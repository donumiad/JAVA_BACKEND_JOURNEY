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paragraph-properties fo:margin-top="0cm" fo:margin-bottom="0.499cm" style:contextual-spac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ula — Módulo 5, Dia 1</text:h>
      <text:h text:style-name="Heading_20_2" text:outline-level="2">Visão Geral do JDBC e Preparação do Projeto</text:h>
      <text:p text:style-name="Horizontal_20_Line"/>
      <text:h text:style-name="Heading_20_2" text:outline-level="2">1. O problema que o JDBC resolve</text:h>
      <text:p text:style-name="Text_20_body">Antes da sintaxe, o problema. Seu código Java roda numa JVM. Seu banco PostgreSQL roda como um processo completamente separado, possivelmente numa máquina diferente, ouvindo numa porta de rede. Para esses dois mundos conversarem, alguém precisa traduzir entre duas linguagens fundamentalmente diferentes: chamadas de método Java de um lado, comandos SQL e protocolo de rede do banco do outro.</text:p>
      <text:p text:style-name="Text_20_body">Antes do JDBC existir, cada banco de dados tinha sua própria API proprietária. Código escrito para conversar com Oracle não funcionava com Sybase, que não funcionava com Informix. Trocar de banco significava reescrever toda a camada de acesso a dados.</text:p>
      <text:p text:style-name="Text_20_body">O JDBC — <text:span text:style-name="Emphasis">Java Database Connectivity</text:span> — é uma especificação que resolve isso definindo um <text:span text:style-name="Strong_20_Emphasis">contrato único</text:span>: um conjunto de interfaces no pacote <text:span text:style-name="Source_20_Text">java.sql</text:span> que qualquer banco pode implementar. <text:span text:style-name="Source_20_Text">Connection</text:span>, <text:span text:style-name="Source_20_Text">Statement</text:span>, <text:span text:style-name="Source_20_Text">PreparedStatement</text:span>, <text:span text:style-name="Source_20_Text">ResultSet</text:span> — são todas interfaces. O JDBC em si não sabe nada sobre PostgreSQL, MySQL ou Oracle especificamente.</text:p>
      <text:p text:style-name="Horizontal_20_Line"/>
      <text:h text:style-name="Heading_20_2" text:outline-level="2">2. O papel do driver</text:h>
      <text:p text:style-name="Text_20_body">Quem preenche essa lacuna é o <text:span text:style-name="Strong_20_Emphasis">driver JDBC</text:span> — uma biblioteca específica de cada banco que implementa as interfaces do <text:span text:style-name="Source_20_Text">java.sql</text:span> traduzindo as chamadas para o protocolo de rede daquele banco específico.</text:p>
      <text:p text:style-name="Text_20_body">O driver do PostgreSQL — chamado <text:span text:style-name="Strong_20_Emphasis">pgJDBC</text:span> — implementa <text:span text:style-name="Source_20_Text">Connection</text:span> como <text:span text:style-name="Source_20_Text">PgConnection</text:span>, implementa <text:span text:style-name="Source_20_Text">PreparedStatement</text:span> como <text:span text:style-name="Source_20_Text">PgPreparedStatement</text:span>, e assim por diante. Seu código Java nunca referencia essas classes concretas diretamente — você programa contra as interfaces do <text:span text:style-name="Source_20_Text">java.sql</text:span>, e o driver entrega a implementação concreta em tempo de execução.</text:p>
      <text:p text:style-name="Text_20_body">Isso é polimorfismo aplicado em escala arquitetural: seu código <text:span text:style-name="Source_20_Text">ProdutoDao</text:span> vai compilar e funcionar contra <text:span text:style-name="Source_20_Text">Connection</text:span>, <text:span text:style-name="Source_20_Text">PreparedStatement</text:span> e <text:span text:style-name="Source_20_Text">ResultSet</text:span> — independente de qual banco está por trás. Se amanhã você precisar migrar de PostgreSQL para MySQL, troca o driver e a string de conexão. O código que usa essas interfaces, em teoria, não muda — desde que você não tenha usado nenhuma sintaxe SQL específica do PostgreSQL nas suas queries.</text:p>
      <text:h text:style-name="Heading_20_3" text:outline-level="3">Driver tipo 4 — o que isso significa na prática</text:h>
      <text:p text:style-name="Text_20_body">Drivers JDBC históricos eram classificados em quatro tipos, mas só o <text:span text:style-name="Strong_20_Emphasis">tipo 4</text:span> é relevante hoje — os outros três são curiosidade histórica.</text:p>
      <text:p text:style-name="Text_20_body"><text:soft-page-break/>Um driver tipo 4 é escrito <text:span text:style-name="Strong_20_Emphasis">inteiramente em Java</text:span> e implementa o protocolo de comunicação nativo do banco diretamente — sem nenhuma camada intermediária nativa (C, ODBC) entre o driver e o banco. O pgJDBC fala o protocolo de rede do PostgreSQL diretamente, em Java puro, через TCP/IP.</text:p>
      <text:p text:style-name="Text_20_body">Isso significa que o <text:span text:style-name="Source_20_Text">.jar</text:span> do driver — que você vai declarar como dependência Maven — é <text:span text:style-name="Strong_20_Emphasis">autossuficiente</text:span>. Não exige nenhuma instalação adicional no sistema operacional, nenhuma biblioteca nativa, nenhum ODBC configurado. Você adiciona a dependência no <text:span text:style-name="Source_20_Text">pom.xml</text:span>, o Maven baixa o <text:span text:style-name="Source_20_Text">.jar</text:span>, e está pronto. Essa portabilidade é uma das razões pelas quais drivers tipo 4 dominaram o ecossistema Java — eles seguem a filosofia "write once, run anywhere" do próprio Java.</text:p>
      <text:p text:style-name="Horizontal_20_Line"/>
      <text:h text:style-name="Heading_20_2" text:outline-level="2">3. O fluxo completo de uma operação JDBC</text:h>
      <text:p text:style-name="Text_20_body">Esse é o mapa mental que você precisa internalizar antes de escrever qualquer código. Toda operação JDBC, do mais simples <text:span text:style-name="Source_20_Text">SELECT</text:span> à transação mais complexa, segue essencialmente este fluxo:</text:p>
      <text:p text:style-name="Preformatted_20_Text"><text:span text:style-name="Source_20_Text">1. Carregar o driver (registro automático, hoje em dia)</text:span></text:p>
      <text:p text:style-name="Preformatted_20_Text"><text:span text:style-name="Source_20_Text">2. Abrir uma Connection com o banco</text:span></text:p>
      <text:p text:style-name="Preformatted_20_Text"><text:span text:style-name="Source_20_Text">3. Criar um PreparedStatement com o SQL desejado</text:span></text:p>
      <text:p text:style-name="Preformatted_20_Text"><text:span text:style-name="Source_20_Text">4. Executar o statement</text:span></text:p>
      <text:p text:style-name="Preformatted_20_Text"><text:span text:style-name="Source_20_Text">5. Se for consulta: percorrer o ResultSet retornado</text:span></text:p>
      <text:p text:style-name="P1"><text:span text:style-name="Source_20_Text">6. Fechar os recursos (ResultSet, PreparedStatement, Connection)</text:span></text:p>
      <text:p text:style-name="Text_20_body">Cada uma dessas etapas corresponde a um objeto Java específico. Vamos entender o papel de cada um antes de ver código.</text:p>
      <text:p text:style-name="Horizontal_20_Line"/>
      <text:h text:style-name="Heading_20_2" text:outline-level="2">4. Connection — a conversa aberta com o banco</text:h>
      <text:p text:style-name="Text_20_body"><text:span text:style-name="Source_20_Text">Connection</text:span> representa uma <text:span text:style-name="Strong_20_Emphasis">sessão ativa</text:span> com o banco de dados. É o objeto que carrega a autenticação, o estado da transação atual, e é através dele que qualquer comando SQL é enviado.</text:p>
      <text:p text:style-name="Text_20_body">Pense nela como uma ligação telefônica. Abrir uma <text:span text:style-name="Source_20_Text">Connection</text:span> é como discar e a chamada ser atendida — há um custo real nesse processo: autenticação, handshake de rede, alocação de recursos no servidor do banco. Por isso, como você vai ver mais adiante no módulo, conexões não são coisas que você abre e fecha a cada operação trivial em sistemas de produção — existe todo um conceito de <text:span text:style-name="Strong_20_Emphasis">pool de conexões</text:span> para reaproveitá-las, que vamos abordar quando chegarmos lá.</text:p>
      <text:p text:style-name="Text_20_body">Por enquanto, no Dia 1, você só precisa saber: uma <text:span text:style-name="Source_20_Text">Connection</text:span> é cara de criar, e por isso precisa ser fechada corretamente assim que não for mais necessária — nunca esquecida aberta.</text:p>
      <text:p text:style-name="Horizontal_20_Line"/>
      <text:h text:style-name="Heading_20_2" text:outline-level="2">5. PreparedStatement — o comando parametrizado</text:h>
      <text:p text:style-name="Text_20_body"><text:span text:style-name="Source_20_Text">PreparedStatement</text:span> representa um comando SQL <text:span text:style-name="Strong_20_Emphasis">pré-compilado</text:span>, com espaços reservados (<text:span text:style-name="Source_20_Text">?</text:span>) para valores que serão fornecidos depois.</text:p>
      <text:p text:style-name="Preformatted_20_Text"><text:soft-page-break/><text:span text:style-name="Source_20_Text">String sql = "SELECT * FROM produtos WHERE nome = ?";</text:span></text:p>
      <text:p text:style-name="Preformatted_20_Text"><text:span text:style-name="Source_20_Text">PreparedStatement stmt = connection.prepareStatement(sql);</text:span></text:p>
      <text:p text:style-name="P1"><text:span text:style-name="Source_20_Text">stmt.setString(1, "Mouse");</text:span></text:p>
      <text:p text:style-name="Text_20_body">A palavra "prepared" não é decorativa. Quando você cria um <text:span text:style-name="Source_20_Text">PreparedStatement</text:span>, o banco analisa a estrutura do SQL, monta um plano de execução, e fica esperando os valores dos parâmetros. Isso tem duas vantagens importantes que você vai aprofundar mais à frente no módulo: performance (o banco pode reutilizar o plano de execução em chamadas repetidas com parâmetros diferentes) e segurança (impossibilita SQL Injection, porque os valores nunca são interpretados como parte do comando SQL — são sempre tratados como dado puro).</text:p>
      <text:p text:style-name="Text_20_body">Existe também <text:span text:style-name="Source_20_Text">Statement</text:span> — a versão sem parametrização, onde você concatena o SQL inteiro como string. Vamos ver no Dia 10 por que isso é perigoso. Por ora, a regra para internalizar desde já: <text:span text:style-name="Strong_20_Emphasis">você vai usar </text:span><text:span text:style-name="Strong_20_Emphasis"><text:span text:style-name="Source_20_Text">PreparedStatement</text:span></text:span><text:span text:style-name="Strong_20_Emphasis"> sempre, mesmo quando não há parâmetro nenhum.</text:span></text:p>
      <text:p text:style-name="Horizontal_20_Line"/>
      <text:h text:style-name="Heading_20_2" text:outline-level="2">6. ResultSet — o cursor sobre os resultados</text:h>
      <text:p text:style-name="Text_20_body"><text:span text:style-name="Source_20_Text">ResultSet</text:span> é o objeto que representa o <text:span text:style-name="Strong_20_Emphasis">resultado de uma consulta</text:span> — uma tabela de dados que você percorre linha por linha.</text:p>
      <text:p text:style-name="Preformatted_20_Text"><text:span text:style-name="Source_20_Text">ResultSet rs = stmt.executeQuery();</text:span></text:p>
      <text:p text:style-name="Preformatted_20_Text"><text:span text:style-name="Source_20_Text">while (rs.next()) {</text:span></text:p>
      <text:p text:style-name="Preformatted_20_Text"><text:span text:style-name="Source_20_Text"><text:s text:c="4"/>String nome = rs.getString("nome");</text:span></text:p>
      <text:p text:style-name="Preformatted_20_Text"><text:span text:style-name="Source_20_Text"><text:s text:c="4"/>BigDecimal preco = rs.getBigDecimal("preco");</text:span></text:p>
      <text:p text:style-name="P1"><text:span text:style-name="Source_20_Text">}</text:span></text:p>
      <text:p text:style-name="Text_20_body">O conceito mais importante aqui — que vai parecer estranho na primeira vez — é que <text:span text:style-name="Source_20_Text">ResultSet</text:span> é um <text:span text:style-name="Strong_20_Emphasis">cursor</text:span>, não uma coleção pronta. Ele não chega na sua aplicação com todas as linhas já carregadas em memória como um <text:span text:style-name="Source_20_Text">ArrayList</text:span>. Você chama <text:span text:style-name="Source_20_Text">rs.next()</text:span> para avançar para a próxima linha, e o método retorna <text:span text:style-name="Source_20_Text">false</text:span> quando não há mais linhas. Antes do primeiro <text:span text:style-name="Source_20_Text">next()</text:span>, o cursor está posicionado <text:span text:style-name="Strong_20_Emphasis">antes</text:span> da primeira linha — chamar <text:span text:style-name="Source_20_Text">rs.getString(...)</text:span> nesse ponto lança exceção.</text:p>
      <text:p text:style-name="Text_20_body">Isso explica o padrão <text:span text:style-name="Source_20_Text">while (rs.next()) { ... }</text:span> que você vai ver em todo código JDBC: é literalmente "enquanto existir uma próxima linha, avance e processe".</text:p>
      <text:p text:style-name="Horizontal_20_Line"/>
      <text:h text:style-name="Heading_20_2" text:outline-level="2">7. Por que fechar recursos corretamente importa — preparação para o Dia 2</text:h>
      <text:p text:style-name="Text_20_body">O cronograma já antecipa o <text:span text:style-name="Source_20_Text">try-with-resources</text:span> para amanhã, mas vale plantar a semente conceitual hoje.</text:p>
      <text:p text:style-name="Text_20_body"><text:span text:style-name="Source_20_Text">Connection</text:span>, <text:span text:style-name="Source_20_Text">PreparedStatement</text:span> e <text:span text:style-name="Source_20_Text">ResultSet</text:span> não são apenas objetos Java comuns que o Garbage Collector limpa quando ninguém mais os referencia. Eles representam <text:span text:style-name="Strong_20_Emphasis">recursos do sistema operacional</text:span> — sockets de rede abertos, cursores no banco de dados, memória alocada do lado do servidor. Se você não fecha esses recursos explicitamente, eles continuam consumindo memória e conexões no banco mesmo depois que seu método Java retornou — até que, <text:soft-page-break/>eventualmente, o Garbage Collector os colete, o que pode levar muito tempo ou nunca acontecer de forma confiável.</text:p>
      <text:p text:style-name="Text_20_body">Em produção, isso se manifesta como <text:span text:style-name="Strong_20_Emphasis">vazamento de conexões</text:span> — o banco eventualmente recusa novas conexões porque o limite máximo configurado foi atingido por conexões "esquecidas" abertas. É um dos bugs mais clássicos e mais difíceis de diagnosticar em sistemas Java com JDBC mal escrito, porque o sintoma — banco recusando conexões — aparece minutos ou horas depois da causa raiz.</text:p>
      <text:p text:style-name="Text_20_body">Amanhã você vai ver a ferramenta que resolve isso de forma elegante e automática. Por hoje, o que importa é que você entenda <text:span text:style-name="Strong_20_Emphasis">por que</text:span> essa preocupação existe.</text:p>
      <text:p text:style-name="Horizontal_20_Line"/>
      <text:h text:style-name="Heading_20_2" text:outline-level="2">8. Preparando o projeto — estrutura de pacotes</text:h>
      <text:p text:style-name="Text_20_body">Seguindo o cronograma, a estrutura de pacotes do Módulo 5 é:</text:p>
      <text:p text:style-name="Preformatted_20_Text"><text:span text:style-name="Source_20_Text">src/main/java/br/com/raimundo/estoque/</text:span></text:p>
      <text:p text:style-name="Preformatted_20_Text"><text:span text:style-name="Source_20_Text">├── model/</text:span></text:p>
      <text:p text:style-name="Preformatted_20_Text"><text:span text:style-name="Source_20_Text">├── dao/</text:span></text:p>
      <text:p text:style-name="Preformatted_20_Text"><text:span text:style-name="Source_20_Text">├── connection/</text:span></text:p>
      <text:p text:style-name="P1"><text:span text:style-name="Source_20_Text">└── app/</text:span></text:p>
      <text:p text:style-name="Text_20_body">Compare com a estrutura do Módulo 4 (<text:span text:style-name="Source_20_Text">model</text:span>, <text:span text:style-name="Source_20_Text">repository</text:span>, <text:span text:style-name="Source_20_Text">service</text:span>, <text:span text:style-name="Source_20_Text">app</text:span>). Aqui há duas mudanças relevantes.</text:p>
      <text:p text:style-name="Text_20_body"><text:span text:style-name="Strong_20_Emphasis"><text:span text:style-name="Source_20_Text">dao</text:span></text:span><text:span text:style-name="Strong_20_Emphasis"> no lugar de </text:span><text:span text:style-name="Strong_20_Emphasis"><text:span text:style-name="Source_20_Text">repository</text:span></text:span><text:span text:style-name="Strong_20_Emphasis">.</text:span> São nomes para conceitos muito próximos — ambos representam a camada de acesso a dados. <text:span text:style-name="Source_20_Text">DAO</text:span> (<text:span text:style-name="Emphasis">Data Access Object</text:span>) é o termo clássico, vindo de um padrão de design formalizado nos anos 2000. <text:span text:style-name="Source_20_Text">Repository</text:span> é o termo que ganhou força com Domain-Driven Design e que o Spring Data adota. Vou aprofundar a diferença terminológica real entre os dois quando chegarmos no Dia 11 — por ora, para todo efeito prático no JDBC puro, trate-os como sinônimos.</text:p>
      <text:p text:style-name="Text_20_body"><text:span text:style-name="Strong_20_Emphasis"><text:span text:style-name="Source_20_Text">connection</text:span></text:span><text:span text:style-name="Strong_20_Emphasis"> é um pacote novo.</text:span> Não existia no Módulo 4 porque você não tinha conexão real com banco a gerenciar. Esse pacote vai conter a classe responsável por <text:span text:style-name="Strong_20_Emphasis">centralizar a criação de conexões</text:span> — você vai construir isso amanhã.</text:p>
      <text:p text:style-name="Text_20_body">O fluxo de dependência continua unidirecional, agora com uma peça nova:</text:p>
      <text:p text:style-name="Preformatted_20_Text"><text:span text:style-name="Source_20_Text">app → dao → connection</text:span></text:p>
      <text:p text:style-name="P1"><text:span text:style-name="Source_20_Text">app → dao → model</text:span></text:p>
      <text:p text:style-name="Text_20_body"><text:span text:style-name="Source_20_Text">dao</text:span> depende de <text:span text:style-name="Source_20_Text">connection</text:span> para obter conexões, e depende de <text:span text:style-name="Source_20_Text">model</text:span> para saber o que mapear do <text:span text:style-name="Source_20_Text">ResultSet</text:span>. <text:span text:style-name="Source_20_Text">connection</text:span> não depende de nada do seu projeto — é uma peça isolada e genérica.</text:p>
      <text:p text:style-name="Horizontal_20_Line"/>
      <text:h text:style-name="Heading_20_2" text:outline-level="2">9. Criando o projeto Maven</text:h>
      <text:p text:style-name="Text_20_body">Mesma disciplina do Módulo 4: projeto novo, <text:span text:style-name="Source_20_Text">pom.xml</text:span> com coordenadas próprias.</text:p>
      <text:p text:style-name="Preformatted_20_Text"><text:span text:style-name="Source_20_Text">&lt;project&gt;</text:span></text:p>
      <text:p text:style-name="Preformatted_20_Text"><text:soft-page-break/><text:span text:style-name="Source_20_Text"><text:s text:c="4"/>&lt;modelVersion&gt;4.0.0&lt;/modelVersion&gt;</text:span></text:p>
      <text:p text:style-name="Preformatted_20_Text"/>
      <text:p text:style-name="Preformatted_20_Text"><text:span text:style-name="Source_20_Text"><text:s text:c="4"/>&lt;groupId&gt;br.com.raimundo&lt;/groupId&gt;</text:span></text:p>
      <text:p text:style-name="Preformatted_20_Text"><text:span text:style-name="Source_20_Text"><text:s text:c="4"/>&lt;artifactId&gt;modulo-5-estoque-jdbc&lt;/artifactId&gt;</text:span></text:p>
      <text:p text:style-name="Preformatted_20_Text"><text:span text:style-name="Source_20_Text"><text:s text:c="4"/>&lt;version&gt;1.0-SNAPSHOT&lt;/version&gt;</text:span></text:p>
      <text:p text:style-name="Preformatted_20_Text"/>
      <text:p text:style-name="Preformatted_20_Text"><text:span text:style-name="Source_20_Text"><text:s text:c="4"/>&lt;properties&gt;</text:span></text:p>
      <text:p text:style-name="Preformatted_20_Text"><text:span text:style-name="Source_20_Text"><text:s text:c="8"/>&lt;maven.compiler.source&gt;21&lt;/maven.compiler.source&gt;</text:span></text:p>
      <text:p text:style-name="Preformatted_20_Text"><text:span text:style-name="Source_20_Text"><text:s text:c="8"/>&lt;maven.compiler.target&gt;21&lt;/maven.compiler.target&gt;</text:span></text:p>
      <text:p text:style-name="Preformatted_20_Text"><text:span text:style-name="Source_20_Text"><text:s text:c="8"/>&lt;project.build.sourceEncoding&gt;UTF-8&lt;/project.build.sourceEncoding&gt;</text:span></text:p>
      <text:p text:style-name="Preformatted_20_Text"><text:span text:style-name="Source_20_Text"><text:s text:c="4"/>&lt;/properties&gt;</text:span></text:p>
      <text:p text:style-name="P1"><text:span text:style-name="Source_20_Text">&lt;/project&gt;</text:span></text:p>
      <text:p text:style-name="Horizontal_20_Line"/>
      <text:h text:style-name="Heading_20_2" text:outline-level="2">10. Adicionando a dependência do driver PostgreSQL</text:h>
      <text:p text:style-name="Text_20_body">Essa é a primeira dependência real de produção que você adiciona — diferente do JUnit, que é <text:span text:style-name="Source_20_Text">scope test</text:span>, o driver é necessário em <text:span text:style-name="Strong_20_Emphasis">tempo de execução</text:span>.</text:p>
      <text:p text:style-name="Preformatted_20_Text"><text:span text:style-name="Source_20_Text">&lt;dependencies&gt;</text:span></text:p>
      <text:p text:style-name="Preformatted_20_Text"><text:span text:style-name="Source_20_Text"><text:s text:c="4"/>&lt;dependency&gt;</text:span></text:p>
      <text:p text:style-name="Preformatted_20_Text"><text:span text:style-name="Source_20_Text"><text:s text:c="8"/>&lt;groupId&gt;org.postgresql&lt;/groupId&gt;</text:span></text:p>
      <text:p text:style-name="Preformatted_20_Text"><text:span text:style-name="Source_20_Text"><text:s text:c="8"/>&lt;artifactId&gt;postgresql&lt;/artifactId&gt;</text:span></text:p>
      <text:p text:style-name="Preformatted_20_Text"><text:span text:style-name="Source_20_Text"><text:s text:c="8"/>&lt;version&gt;42.7.4&lt;/version&gt;</text:span></text:p>
      <text:p text:style-name="Preformatted_20_Text"><text:span text:style-name="Source_20_Text"><text:s text:c="4"/>&lt;/dependency&gt;</text:span></text:p>
      <text:p text:style-name="P1"><text:span text:style-name="Source_20_Text">&lt;/dependencies&gt;</text:span></text:p>
      <text:p text:style-name="Text_20_body">Pense no escopo dessa dependência com o que você aprendeu na Semana 1 do Módulo 4. O driver não tem scope <text:span text:style-name="Source_20_Text">provided</text:span> nem <text:span text:style-name="Source_20_Text">runtime</text:span> explícito — ele fica como <text:span text:style-name="Source_20_Text">compile</text:span> (o padrão), porque seu código <text:span text:style-name="Strong_20_Emphasis">referencia diretamente</text:span> classes do pacote do driver em alguns pontos (ainda que minimamente, como ao carregar a classe do driver, que veremos amanhã). Isso é uma sutileza: tecnicamente seu código compila contra as interfaces <text:span text:style-name="Source_20_Text">java.sql.*</text:span>, que são do próprio JDK — mas o <text:span text:style-name="Source_20_Text">.jar</text:span> do driver precisa estar no classpath em tempo de execução para que <text:span text:style-name="Source_20_Text">DriverManager</text:span> encontre uma implementação concreta. Na prática, declarar como dependência padrão (<text:span text:style-name="Source_20_Text">compile</text:span>) é o que se faz — o Maven cuida de garantir que ele esteja disponível tanto para compilar quanto para rodar.</text:p>
      <text:p text:style-name="Horizontal_20_Line"/>
      <text:h text:style-name="Heading_20_2" text:outline-level="2">11. A classe Produto</text:h>
      <text:p text:style-name="Text_20_body">Seguindo o modelo definido no cronograma, com as correções de tipo que você já praticou no fechamento do Módulo 4:</text:p>
      <text:p text:style-name="Preformatted_20_Text"><text:span text:style-name="Source_20_Text">package br.com.raimundo.estoque.model;</text:span></text:p>
      <text:p text:style-name="Preformatted_20_Text"/>
      <text:p text:style-name="Preformatted_20_Text"><text:span text:style-name="Source_20_Text">import java.math.BigDecimal;</text:span></text:p>
      <text:p text:style-name="Preformatted_20_Text"/>
      <text:p text:style-name="Preformatted_20_Text"><text:span text:style-name="Source_20_Text">public class Produto {</text:span></text:p>
      <text:p text:style-name="Preformatted_20_Text"/>
      <text:p text:style-name="Preformatted_20_Text"><text:span text:style-name="Source_20_Text"><text:s text:c="4"/>private Long id;</text:span></text:p>
      <text:p text:style-name="Preformatted_20_Text"><text:span text:style-name="Source_20_Text"><text:s text:c="4"/>private String nome;</text:span></text:p>
      <text:p text:style-name="Preformatted_20_Text"><text:span text:style-name="Source_20_Text"><text:s text:c="4"/>private String categoria;</text:span></text:p>
      <text:p text:style-name="Preformatted_20_Text"><text:span text:style-name="Source_20_Text"><text:s text:c="4"/>private BigDecimal preco;</text:span></text:p>
      <text:p text:style-name="Preformatted_20_Text"><text:span text:style-name="Source_20_Text"><text:s text:c="4"/>private Integer quantidade;</text:span></text:p>
      <text:p text:style-name="Preformatted_20_Text"><text:soft-page-break/></text:p>
      <text:p text:style-name="Preformatted_20_Text"><text:span text:style-name="Source_20_Text"><text:s text:c="4"/>public Produto() {</text:span></text:p>
      <text:p text:style-name="Preformatted_20_Text"><text:span text:style-name="Source_20_Text"><text:s text:c="4"/>}</text:span></text:p>
      <text:p text:style-name="Preformatted_20_Text"/>
      <text:p text:style-name="Preformatted_20_Text"><text:span text:style-name="Source_20_Text"><text:s text:c="4"/>public Produto(String nome, String categoria, BigDecimal preco, Integer quantidade) {</text:span></text:p>
      <text:p text:style-name="Preformatted_20_Text"><text:span text:style-name="Source_20_Text"><text:s text:c="8"/>this.nome = nome;</text:span></text:p>
      <text:p text:style-name="Preformatted_20_Text"><text:span text:style-name="Source_20_Text"><text:s text:c="8"/>this.categoria = categoria;</text:span></text:p>
      <text:p text:style-name="Preformatted_20_Text"><text:span text:style-name="Source_20_Text"><text:s text:c="8"/>this.preco = preco;</text:span></text:p>
      <text:p text:style-name="Preformatted_20_Text"><text:span text:style-name="Source_20_Text"><text:s text:c="8"/>this.quantidade = quantidade;</text:span></text:p>
      <text:p text:style-name="Preformatted_20_Text"><text:span text:style-name="Source_20_Text"><text:s text:c="4"/>}</text:span></text:p>
      <text:p text:style-name="Preformatted_20_Text"/>
      <text:p text:style-name="Preformatted_20_Text"><text:span text:style-name="Source_20_Text"><text:s text:c="4"/>public Produto(Long id, String nome, String categoria, BigDecimal preco, Integer quantidade) {</text:span></text:p>
      <text:p text:style-name="Preformatted_20_Text"><text:span text:style-name="Source_20_Text"><text:s text:c="8"/>this.id = id;</text:span></text:p>
      <text:p text:style-name="Preformatted_20_Text"><text:span text:style-name="Source_20_Text"><text:s text:c="8"/>this.nome = nome;</text:span></text:p>
      <text:p text:style-name="Preformatted_20_Text"><text:span text:style-name="Source_20_Text"><text:s text:c="8"/>this.categoria = categoria;</text:span></text:p>
      <text:p text:style-name="Preformatted_20_Text"><text:span text:style-name="Source_20_Text"><text:s text:c="8"/>this.preco = preco;</text:span></text:p>
      <text:p text:style-name="Preformatted_20_Text"><text:span text:style-name="Source_20_Text"><text:s text:c="8"/>this.quantidade = quantidade;</text:span></text:p>
      <text:p text:style-name="Preformatted_20_Text"><text:span text:style-name="Source_20_Text"><text:s text:c="4"/>}</text:span></text:p>
      <text:p text:style-name="Preformatted_20_Text"/>
      <text:p text:style-name="Preformatted_20_Text"><text:span text:style-name="Source_20_Text"><text:s text:c="4"/>// getters e setters</text:span></text:p>
      <text:p text:style-name="Preformatted_20_Text"/>
      <text:p text:style-name="Preformatted_20_Text"><text:span text:style-name="Source_20_Text"><text:s text:c="4"/>@Override</text:span></text:p>
      <text:p text:style-name="Preformatted_20_Text"><text:span text:style-name="Source_20_Text"><text:s text:c="4"/>public String toString() {</text:span></text:p>
      <text:p text:style-name="Preformatted_20_Text"><text:span text:style-name="Source_20_Text"><text:s text:c="8"/>return "Produto{" +</text:span></text:p>
      <text:p text:style-name="Preformatted_20_Text"><text:span text:style-name="Source_20_Text"><text:s text:c="16"/>"id=" + id +</text:span></text:p>
      <text:p text:style-name="Preformatted_20_Text"><text:span text:style-name="Source_20_Text"><text:s text:c="16"/>", nome='" + nome + '\'' +</text:span></text:p>
      <text:p text:style-name="Preformatted_20_Text"><text:span text:style-name="Source_20_Text"><text:s text:c="16"/>", categoria='" + categoria + '\'' +</text:span></text:p>
      <text:p text:style-name="Preformatted_20_Text"><text:span text:style-name="Source_20_Text"><text:s text:c="16"/>", preco=" + preco +</text:span></text:p>
      <text:p text:style-name="Preformatted_20_Text"><text:span text:style-name="Source_20_Text"><text:s text:c="16"/>", quantidade=" + quantidade +</text:span></text:p>
      <text:p text:style-name="Preformatted_20_Text"><text:span text:style-name="Source_20_Text"><text:s text:c="16"/>'}';</text:span></text:p>
      <text:p text:style-name="Preformatted_20_Text"><text:span text:style-name="Source_20_Text"><text:s text:c="4"/>}</text:span></text:p>
      <text:p text:style-name="P1"><text:span text:style-name="Source_20_Text">}</text:span></text:p>
      <text:p text:style-name="Text_20_body">Repare em duas decisões deliberadas.</text:p>
      <text:p text:style-name="Text_20_body"><text:span text:style-name="Strong_20_Emphasis">Dois construtores.</text:span> Um sem <text:span text:style-name="Source_20_Text">id</text:span> — usado ao criar um produto novo, antes de ser persistido, quando o banco ainda vai gerar o ID via <text:span text:style-name="Source_20_Text">SERIAL</text:span>. Outro com <text:span text:style-name="Source_20_Text">id</text:span> — usado ao reconstruir um <text:span text:style-name="Source_20_Text">Produto</text:span> a partir de uma linha do <text:span text:style-name="Source_20_Text">ResultSet</text:span>, onde o ID já existe no banco. Essa distinção entre "objeto novo, ainda sem identidade no banco" e "objeto existente, reconstruído a partir de dados persistidos" é um conceito que vai reaparecer com muito mais formalidade quando você estudar JPA — lá tem até nome: <text:span text:style-name="Emphasis">transient</text:span> vs <text:span text:style-name="Emphasis">managed</text:span>.</text:p>
      <text:p text:style-name="Text_20_body"><text:span text:style-name="Strong_20_Emphasis"><text:span text:style-name="Source_20_Text">Integer</text:span></text:span><text:span text:style-name="Strong_20_Emphasis"> em vez de </text:span><text:span text:style-name="Strong_20_Emphasis"><text:span text:style-name="Source_20_Text">int</text:span></text:span><text:span text:style-name="Strong_20_Emphasis"> para quantidade, </text:span><text:span text:style-name="Strong_20_Emphasis"><text:span text:style-name="Source_20_Text">Long</text:span></text:span><text:span text:style-name="Strong_20_Emphasis"> em vez de </text:span><text:span text:style-name="Strong_20_Emphasis"><text:span text:style-name="Source_20_Text">long</text:span></text:span><text:span text:style-name="Strong_20_Emphasis"> para id.</text:span> Isso é deliberado e conecta com algo importante: tipos primitivos em Java <text:span text:style-name="Strong_20_Emphasis">nunca podem ser nulos</text:span>. Tipos wrapper (<text:span text:style-name="Source_20_Text">Integer</text:span>, <text:span text:style-name="Source_20_Text">Long</text:span>) podem. Quando você busca um produto no banco e uma coluna está nula, <text:span text:style-name="Source_20_Text">rs.getInt(...)</text:span> retornaria <text:span text:style-name="Source_20_Text">0</text:span> silenciosamente — indistinguível de um produto que genuinamente tem quantidade zero. <text:span text:style-name="Source_20_Text">rs.getObject(..., Integer.class)</text:span> ou tratamento explícito permite representar ausência de valor como <text:span text:style-name="Source_20_Text">null</text:span> de verdade. Vamos aprofundar isso com cuidado quando chegarmos no mapeamento do <text:span text:style-name="Source_20_Text">ResultSet</text:span>, no Dia 4 — mas a decisão de design começa aqui, na própria classe model.</text:p>
      <text:p text:style-name="Horizontal_20_Line"/>
      <text:h text:style-name="Heading_20_2" text:outline-level="2"><text:soft-page-break/>12. A pasta sql/ e o script da tabela</text:h>
      <text:p text:style-name="Preformatted_20_Text"><text:span text:style-name="Source_20_Text">modulo-5-estoque-jdbc/</text:span></text:p>
      <text:p text:style-name="Preformatted_20_Text"><text:span text:style-name="Source_20_Text">├── src/</text:span></text:p>
      <text:p text:style-name="Preformatted_20_Text"><text:span text:style-name="Source_20_Text">├── pom.xml</text:span></text:p>
      <text:p text:style-name="Preformatted_20_Text"><text:span text:style-name="Source_20_Text">└── sql/</text:span></text:p>
      <text:p text:style-name="P1"><text:span text:style-name="Source_20_Text"><text:s text:c="4"/>└── 01_create.sql</text:span></text:p>
      <text:p text:style-name="Preformatted_20_Text"><text:span text:style-name="Source_20_Text">-- sql/01_create.sql</text:span></text:p>
      <text:p text:style-name="Preformatted_20_Text"><text:span text:style-name="Source_20_Text">-- Tabela de produtos do Sistema de Estoque</text:span></text:p>
      <text:p text:style-name="Preformatted_20_Text"/>
      <text:p text:style-name="Preformatted_20_Text"><text:span text:style-name="Source_20_Text">DROP TABLE IF EXISTS produtos;</text:span></text:p>
      <text:p text:style-name="Preformatted_20_Text"/>
      <text:p text:style-name="Preformatted_20_Text"><text:span text:style-name="Source_20_Text">CREATE TABLE produtos (</text:span></text:p>
      <text:p text:style-name="Preformatted_20_Text"><text:span text:style-name="Source_20_Text"><text:s text:c="4"/>id <text:s text:c="8"/>SERIAL <text:s text:c="8"/>PRIMARY KEY,</text:span></text:p>
      <text:p text:style-name="Preformatted_20_Text"><text:span text:style-name="Source_20_Text"><text:s text:c="4"/>nome <text:s text:c="6"/>VARCHAR(100) <text:s text:c="2"/>NOT NULL,</text:span></text:p>
      <text:p text:style-name="Preformatted_20_Text"><text:span text:style-name="Source_20_Text"><text:s text:c="4"/>categoria <text:s/>VARCHAR(50) <text:s text:c="3"/>NOT NULL,</text:span></text:p>
      <text:p text:style-name="Preformatted_20_Text"><text:span text:style-name="Source_20_Text"><text:s text:c="4"/>preco <text:s text:c="5"/>DECIMAL(10, 2) NOT NULL CHECK (preco &gt; 0),</text:span></text:p>
      <text:p text:style-name="Preformatted_20_Text"><text:span text:style-name="Source_20_Text"><text:s text:c="4"/>quantidade INTEGER <text:s text:c="7"/>NOT NULL DEFAULT 0 CHECK (quantidade &gt;= 0)</text:span></text:p>
      <text:p text:style-name="P1"><text:span text:style-name="Source_20_Text">);</text:span></text:p>
      <text:p text:style-name="Text_20_body">Nada aqui é novo tecnicamente — é a aplicação direta do que você já domina do Módulo 4. A diferença é que, a partir de amanhã, essa tabela vai parar de ser algo que você só manipula via terminal <text:span text:style-name="Source_20_Text">psql</text:span> ou IntelliJ Database panel, e vai passar a ser manipulada por código Java através do driver que você acabou de configurar.</text:p>
      <text:p text:style-name="Horizontal_20_Line"/>
      <text:h text:style-name="Heading_20_2" text:outline-level="2">13. O fluxo completo, anotado para fixar</text:h>
      <text:p text:style-name="Text_20_body">Fecha a aula de hoje com o mapa mental completo, que é exatamente o que o cronograma pede para anotar:</text:p>
      <text:p text:style-name="Preformatted_20_Text"><text:span text:style-name="Source_20_Text">Código Java</text:span></text:p>
      <text:p text:style-name="Preformatted_20_Text"><text:span text:style-name="Source_20_Text"><text:s text:c="4"/>│</text:span></text:p>
      <text:p text:style-name="Preformatted_20_Text"><text:span text:style-name="Source_20_Text"><text:s text:c="4"/>│ <text:s/>DriverManager.getConnection(url, user, senha)</text:span></text:p>
      <text:p text:style-name="Preformatted_20_Text"><text:span text:style-name="Source_20_Text"><text:s text:c="4"/>▼</text:span></text:p>
      <text:p text:style-name="Preformatted_20_Text"><text:span text:style-name="Source_20_Text">Connection (sessão aberta com o banco)</text:span></text:p>
      <text:p text:style-name="Preformatted_20_Text"><text:span text:style-name="Source_20_Text"><text:s text:c="4"/>│</text:span></text:p>
      <text:p text:style-name="Preformatted_20_Text"><text:span text:style-name="Source_20_Text"><text:s text:c="4"/>│ <text:s/>connection.prepareStatement(sql)</text:span></text:p>
      <text:p text:style-name="Preformatted_20_Text"><text:span text:style-name="Source_20_Text"><text:s text:c="4"/>▼</text:span></text:p>
      <text:p text:style-name="Preformatted_20_Text"><text:span text:style-name="Source_20_Text">PreparedStatement (comando SQL parametrizado e pré-compilado)</text:span></text:p>
      <text:p text:style-name="Preformatted_20_Text"><text:span text:style-name="Source_20_Text"><text:s text:c="4"/>│</text:span></text:p>
      <text:p text:style-name="Preformatted_20_Text"><text:span text:style-name="Source_20_Text"><text:s text:c="4"/>│ <text:s/>stmt.setX(indice, valor) <text:s text:c="2"/>← preenche os "?"</text:span></text:p>
      <text:p text:style-name="Preformatted_20_Text"><text:span text:style-name="Source_20_Text"><text:s text:c="4"/>│ <text:s/>stmt.executeQuery() / executeUpdate()</text:span></text:p>
      <text:p text:style-name="Preformatted_20_Text"><text:span text:style-name="Source_20_Text"><text:s text:c="4"/>▼</text:span></text:p>
      <text:p text:style-name="Preformatted_20_Text"><text:span text:style-name="Source_20_Text">ResultSet (cursor sobre as linhas retornadas, só para SELECT)</text:span></text:p>
      <text:p text:style-name="Preformatted_20_Text"><text:span text:style-name="Source_20_Text"><text:s text:c="4"/>│</text:span></text:p>
      <text:p text:style-name="Preformatted_20_Text"><text:span text:style-name="Source_20_Text"><text:s text:c="4"/>│ <text:s/>while (rs.next()) { rs.getX("coluna") }</text:span></text:p>
      <text:p text:style-name="Preformatted_20_Text"><text:span text:style-name="Source_20_Text"><text:s text:c="4"/>▼</text:span></text:p>
      <text:p text:style-name="Preformatted_20_Text"><text:span text:style-name="Source_20_Text">Objetos Produto reconstruídos em Java</text:span></text:p>
      <text:p text:style-name="Preformatted_20_Text"><text:span text:style-name="Source_20_Text"><text:s text:c="4"/>│</text:span></text:p>
      <text:p text:style-name="Preformatted_20_Text"><text:span text:style-name="Source_20_Text"><text:s text:c="4"/>│ <text:s/>fechar ResultSet, PreparedStatement, Connection</text:span></text:p>
      <text:p text:style-name="Preformatted_20_Text"><text:span text:style-name="Source_20_Text"><text:s text:c="4"/>▼</text:span></text:p>
      <text:p text:style-name="P1"><text:span text:style-name="Source_20_Text">Recursos liberados</text:span></text:p>
      <text:p text:style-name="Text_20_body">Cada seta nesse diagrama é uma chamada de método real que você vai escrever a partir de amanhã. Hoje o objetivo era entender <text:span text:style-name="Strong_20_Emphasis">por que</text:span> cada peça existe antes de digitar a primeira linha de código que efetivamente abre uma conexão.</text:p>
      <text:p text:style-name="Horizontal_20_Line"><text:soft-page-break/></text:p>
      <text:h text:style-name="Heading_20_2" text:outline-level="2">Síntese da aula</text:h>
      <text:p text:style-name="Text_20_body">JDBC é uma especificação de interfaces (<text:span text:style-name="Source_20_Text">java.sql</text:span>) que padroniza o acesso a bancos de dados relacionais a partir do Java. O driver — no seu caso, o pgJDBC, um driver tipo 4 escrito inteiramente em Java — implementa essas interfaces traduzindo chamadas para o protocolo nativo do PostgreSQL, sem exigir nenhuma instalação nativa adicional.</text:p>
      <text:p text:style-name="Text_20_body">O fluxo de qualquer operação JDBC segue sempre a mesma sequência: abrir <text:span text:style-name="Source_20_Text">Connection</text:span>, preparar <text:span text:style-name="Source_20_Text">PreparedStatement</text:span> com parâmetros, executar, percorrer <text:span text:style-name="Source_20_Text">ResultSet</text:span> se houver retorno, e fechar tudo. <text:span text:style-name="Source_20_Text">Connection</text:span> é cara de criar e representa recursos reais do sistema operacional — por isso fechar corretamente não é boa prática opcional, é necessidade técnica para evitar vazamento de conexões.</text:p>
      <text:p text:style-name="Text_20_body">O projeto do módulo segue a estrutura <text:span text:style-name="Source_20_Text">model</text:span>, <text:span text:style-name="Source_20_Text">dao</text:span>, <text:span text:style-name="Source_20_Text">connection</text:span>, <text:span text:style-name="Source_20_Text">app</text:span> — uma evolução da estrutura do Módulo 4, com <text:span text:style-name="Source_20_Text">dao</text:span> substituindo <text:span text:style-name="Source_20_Text">repository</text:span> em nome (mesmo conceito) e <text:span text:style-name="Source_20_Text">connection</text:span> como peça nova responsável por centralizar a criação de conexões com o banco.</text:p>
      <text:p text:style-name="Text_20_body">Amanhã você implementa a primeira conexão real — <text:span text:style-name="Source_20_Text">ConnectionFactory</text:span>, <text:span text:style-name="Source_20_Text">DriverManager</text:span>, e o porquê do <text:span text:style-name="Source_20_Text">try-with-resources</text:span> ser o padrão não-negociável a partir de agora.</text:p>
      <text:p text:style-name="Standard"/>
      <text:p text:style-name="Standard"/>
      <text:h text:style-name="Heading_20_1" text:outline-level="1">Aula — Módulo 5, Dia 2</text:h>
      <text:h text:style-name="Heading_20_2" text:outline-level="2">Primeira Conexão com o Banco — DriverManager, URL e try-with-resources</text:h>
      <text:p text:style-name="Horizontal_20_Line"/>
      <text:h text:style-name="Heading_20_2" text:outline-level="2">1. O que acontece quando você abre uma conexão</text:h>
      <text:p text:style-name="Text_20_body">Antes de ver qualquer código, entenda o que está acontecendo fisicamente quando você chama <text:span text:style-name="Source_20_Text">DriverManager.getConnection(...)</text:span>.</text:p>
      <text:p text:style-name="Text_20_body">Seu programa Java pede ao sistema operacional para abrir um <text:span text:style-name="Strong_20_Emphasis">socket TCP</text:span> — uma conexão de rede — para o endereço e porta onde o PostgreSQL está escutando (por padrão, <text:span text:style-name="Source_20_Text">localhost:5432</text:span>). O PostgreSQL aceita a conexão, verifica as credenciais, aloca recursos internos para aquela sessão — memória para o processo backend, um slot no pool de conexões do servidor — e retorna uma confirmação. Só depois disso o <text:span text:style-name="Source_20_Text">getConnection</text:span> retorna o objeto <text:span text:style-name="Source_20_Text">Connection</text:span> para o seu código Java.</text:p>
      <text:p text:style-name="Text_20_body">Tudo isso acontece em milissegundos, mas tem um custo real. Em sistemas de produção com centenas de requests por segundo, esse custo se acumula rapidamente — razão pela qual <text:span text:style-name="Strong_20_Emphasis">connection pools</text:span> existem. Por ora, você vai abrir e fechar conexões manualmente. Mas nunca esqueça que por baixo desse código Java há uma operação de rede real acontecendo.</text:p>
      <text:p text:style-name="Horizontal_20_Line"><text:soft-page-break/></text:p>
      <text:h text:style-name="Heading_20_2" text:outline-level="2">2. A URL de conexão JDBC</text:h>
      <text:p text:style-name="Text_20_body">O <text:span text:style-name="Source_20_Text">DriverManager</text:span> precisa de três informações para abrir uma conexão: <text:span text:style-name="Strong_20_Emphasis">onde está o banco</text:span>, <text:span text:style-name="Strong_20_Emphasis">quem está se conectando</text:span> e <text:span text:style-name="Strong_20_Emphasis">com qual senha</text:span>. O "onde" é expresso como uma URL JDBC, com formato padronizado:</text:p>
      <text:p text:style-name="P1"><text:span text:style-name="Source_20_Text">jdbc:postgresql://host:porta/nome_do_banco</text:span></text:p>
      <text:p text:style-name="Text_20_body">Para o seu ambiente local:</text:p>
      <text:p text:style-name="P1"><text:span text:style-name="Source_20_Text">jdbc:postgresql://localhost:5432/estoque</text:span></text:p>
      <text:p text:style-name="Text_20_body">Cada parte tem um significado preciso:</text:p>
      <text:p text:style-name="Text_20_body"><text:span text:style-name="Strong_20_Emphasis"><text:span text:style-name="Source_20_Text">jdbc:</text:span></text:span> — prefixo obrigatório que identifica isso como uma URL JDBC, não uma URL HTTP ou qualquer outro protocolo.</text:p>
      <text:p text:style-name="Text_20_body"><text:span text:style-name="Strong_20_Emphasis"><text:span text:style-name="Source_20_Text">postgresql:</text:span></text:span> — identifica qual driver deve ser usado. O <text:span text:style-name="Source_20_Text">DriverManager</text:span> usa esse segmento para encontrar o driver registrado que sabe lidar com esse protocolo. É exatamente por isso que o <text:span text:style-name="Source_20_Text">.jar</text:span> do driver precisa estar no classpath — o <text:span text:style-name="Source_20_Text">DriverManager</text:span> precisa encontrá-lo.</text:p>
      <text:p text:style-name="Text_20_body"><text:span text:style-name="Strong_20_Emphasis"><text:span text:style-name="Source_20_Text">//localhost:5432</text:span></text:span> — endereço e porta do servidor PostgreSQL. Em desenvolvimento local é sempre <text:span text:style-name="Source_20_Text">localhost:5432</text:span>. Em produção, seria o endereço real do servidor de banco de dados.</text:p>
      <text:p text:style-name="Text_20_body"><text:span text:style-name="Strong_20_Emphasis"><text:span text:style-name="Source_20_Text">/estoque</text:span></text:span> — o nome do banco de dados ao qual você quer se conectar.</text:p>
      <text:p text:style-name="Text_20_body">A URL pode conter parâmetros adicionais depois do nome do banco:</text:p>
      <text:p text:style-name="P1"><text:span text:style-name="Source_20_Text">jdbc:postgresql://localhost:5432/estoque?ssl=true&amp;sslmode=require</text:span></text:p>
      <text:p text:style-name="Text_20_body">Em produção, SSL é obrigatório. Em desenvolvimento local, normalmente é omitido.</text:p>
      <text:p text:style-name="Horizontal_20_Line"/>
      <text:h text:style-name="Heading_20_2" text:outline-level="2">3. Como o DriverManager encontra o driver</text:h>
      <text:p text:style-name="Text_20_body">Essa é uma parte do funcionamento do JDBC que a maioria dos tutoriais passa sem explicar — e que gera confusão quando algo dá errado.</text:p>
      <text:p text:style-name="Text_20_body">O <text:span text:style-name="Source_20_Text">DriverManager</text:span> mantém uma lista interna de drivers registrados. Quando você chama <text:span text:style-name="Source_20_Text">getConnection(url, ...)</text:span>, ele percorre essa lista procurando um driver que aceite aquela URL — ou seja, um driver cujo <text:span text:style-name="Source_20_Text">acceptsURL("jdbc:postgresql://...")</text:span> retorne <text:span text:style-name="Source_20_Text">true</text:span>. O pgJDBC implementa esse método e retorna <text:span text:style-name="Source_20_Text">true</text:span> para URLs que começam com <text:span text:style-name="Source_20_Text">jdbc:postgresql:</text:span>.</text:p>
      <text:p text:style-name="Text_20_body">Mas como o driver entra nessa lista? Desde o Java 6, via <text:span text:style-name="Strong_20_Emphasis">Service Provider Interface (SPI)</text:span> — um mecanismo automático de descoberta de serviços. O <text:span text:style-name="Source_20_Text">.jar</text:span> do pgJDBC contém um arquivo em <text:span text:style-name="Source_20_Text">META-INF/services/java.sql.Driver</text:span> com o nome da classe de driver. Quando o <text:span text:style-name="Source_20_Text">DriverManager</text:span> é carregado pela primeira vez, ele escaneia o classpath procurando esse arquivo em todos os <text:span text:style-name="Source_20_Text">.jar</text:span> disponíveis e registra automaticamente os drivers que encontra.</text:p>
      <text:p text:style-name="Text_20_body"><text:soft-page-break/>Na prática: você adiciona o <text:span text:style-name="Source_20_Text">.jar</text:span> do pgJDBC no classpath (via dependência Maven) e o driver é registrado automaticamente. Você não precisa chamar <text:span text:style-name="Source_20_Text">Class.forName("org.postgresql.Driver")</text:span> — algo que código antigo fazia explicitamente e que ainda aparece em tutoriais desatualizados.</text:p>
      <text:p text:style-name="Horizontal_20_Line"/>
      <text:h text:style-name="Heading_20_2" text:outline-level="2">4. Por que fechar recursos é mais sério do que parece</text:h>
      <text:p text:style-name="Text_20_body">Você viu ontem que <text:span text:style-name="Source_20_Text">Connection</text:span>, <text:span text:style-name="Source_20_Text">PreparedStatement</text:span> e <text:span text:style-name="Source_20_Text">ResultSet</text:span> representam recursos reais do sistema operacional. Vamos aprofundar o que acontece quando esses recursos não são fechados corretamente.</text:p>
      <text:p text:style-name="Text_20_body">No nível do banco de dados, cada <text:span text:style-name="Source_20_Text">Connection</text:span> aberta corresponde a um <text:span text:style-name="Strong_20_Emphasis">processo backend</text:span> no PostgreSQL — um processo do sistema operacional no servidor. PostgreSQL tem um parâmetro de configuração chamado <text:span text:style-name="Source_20_Text">max_connections</text:span> — por padrão 100. Se sua aplicação abrir 100 conexões e não fechar nenhuma, a 101ª tentativa de conexão falha com:</text:p>
      <text:p text:style-name="P1"><text:span text:style-name="Source_20_Text">FATAL: sorry, too many clients already</text:span></text:p>
      <text:p text:style-name="Text_20_body">Esse erro aparece nas logs do servidor, não no código que "esqueceu" de fechar — o que torna o bug muito difícil de rastrear. A aplicação que está tentando abrir a 101ª conexão recebe um erro aparentemente aleatório, sem nenhuma indicação de que o problema foi causado por conexões vazando em outro lugar.</text:p>
      <text:p text:style-name="Text_20_body">No nível da JVM, o Garbage Collector <text:span text:style-name="Strong_20_Emphasis">não garante</text:span> que finalizers sejam chamados de forma oportuna. Mesmo que <text:span text:style-name="Source_20_Text">Connection</text:span> implemente <text:span text:style-name="Source_20_Text">finalize()</text:span> para fechar o recurso, o GC pode demorar indefinidamente para coletar o objeto — e finalizers no Java moderno estão depreciados exatamente porque são imprevisíveis.</text:p>
      <text:p text:style-name="Text_20_body">O <text:span text:style-name="Source_20_Text">ResultSet</text:span> tem um problema adicional: ele pode estar <text:span text:style-name="Strong_20_Emphasis">consumindo memória do lado do servidor</text:span> enquanto estiver aberto — o cursor do banco mantém o resultado disponível para que você possa navegar linha por linha. Um <text:span text:style-name="Source_20_Text">ResultSet</text:span> esquecido aberto mantém esse cursor vivo no banco.</text:p>
      <text:p text:style-name="Horizontal_20_Line"/>
      <text:h text:style-name="Heading_20_2" text:outline-level="2">5. O padrão antigo — try/finally</text:h>
      <text:p text:style-name="Text_20_body">Para entender por que <text:span text:style-name="Source_20_Text">try-with-resources</text:span> existe, você precisa ver o padrão que ele substituiu. Antes do Java 7, o jeito correto de fechar recursos JDBC era com <text:span text:style-name="Source_20_Text">try/finally</text:span>:</text:p>
      <text:p text:style-name="Preformatted_20_Text"><text:span text:style-name="Source_20_Text">Connection conn = null;</text:span></text:p>
      <text:p text:style-name="Preformatted_20_Text"><text:span text:style-name="Source_20_Text">PreparedStatement stmt = null;</text:span></text:p>
      <text:p text:style-name="Preformatted_20_Text"><text:span text:style-name="Source_20_Text">ResultSet rs = null;</text:span></text:p>
      <text:p text:style-name="Preformatted_20_Text"/>
      <text:p text:style-name="Preformatted_20_Text"><text:span text:style-name="Source_20_Text">try {</text:span></text:p>
      <text:p text:style-name="Preformatted_20_Text"><text:span text:style-name="Source_20_Text"><text:s text:c="4"/>conn = DriverManager.getConnection(url, user, password);</text:span></text:p>
      <text:p text:style-name="Preformatted_20_Text"><text:span text:style-name="Source_20_Text"><text:s text:c="4"/>stmt = conn.prepareStatement("SELECT * FROM produtos");</text:span></text:p>
      <text:p text:style-name="Preformatted_20_Text"><text:span text:style-name="Source_20_Text"><text:s text:c="4"/>rs = stmt.executeQuery();</text:span></text:p>
      <text:p text:style-name="Preformatted_20_Text"/>
      <text:p text:style-name="Preformatted_20_Text"><text:span text:style-name="Source_20_Text"><text:s text:c="4"/>while (rs.next()) {</text:span></text:p>
      <text:p text:style-name="Preformatted_20_Text"><text:span text:style-name="Source_20_Text"><text:s text:c="8"/>// processar resultado</text:span></text:p>
      <text:p text:style-name="Preformatted_20_Text"><text:soft-page-break/><text:span text:style-name="Source_20_Text"><text:s text:c="4"/>}</text:span></text:p>
      <text:p text:style-name="Preformatted_20_Text"><text:span text:style-name="Source_20_Text">} finally {</text:span></text:p>
      <text:p text:style-name="Preformatted_20_Text"><text:span text:style-name="Source_20_Text"><text:s text:c="4"/>if (rs != null) {</text:span></text:p>
      <text:p text:style-name="Preformatted_20_Text"><text:span text:style-name="Source_20_Text"><text:s text:c="8"/>try { rs.close(); } catch (SQLException e) { /* ignorar */ }</text:span></text:p>
      <text:p text:style-name="Preformatted_20_Text"><text:span text:style-name="Source_20_Text"><text:s text:c="4"/>}</text:span></text:p>
      <text:p text:style-name="Preformatted_20_Text"><text:span text:style-name="Source_20_Text"><text:s text:c="4"/>if (stmt != null) {</text:span></text:p>
      <text:p text:style-name="Preformatted_20_Text"><text:span text:style-name="Source_20_Text"><text:s text:c="8"/>try { stmt.close(); } catch (SQLException e) { /* ignorar */ }</text:span></text:p>
      <text:p text:style-name="Preformatted_20_Text"><text:span text:style-name="Source_20_Text"><text:s text:c="4"/>}</text:span></text:p>
      <text:p text:style-name="Preformatted_20_Text"><text:span text:style-name="Source_20_Text"><text:s text:c="4"/>if (conn != null) {</text:span></text:p>
      <text:p text:style-name="Preformatted_20_Text"><text:span text:style-name="Source_20_Text"><text:s text:c="8"/>try { conn.close(); } catch (SQLException e) { /* ignorar */ }</text:span></text:p>
      <text:p text:style-name="Preformatted_20_Text"><text:span text:style-name="Source_20_Text"><text:s text:c="4"/>}</text:span></text:p>
      <text:p text:style-name="P1"><text:span text:style-name="Source_20_Text">}</text:span></text:p>
      <text:p text:style-name="Text_20_body">Esse código é <text:span text:style-name="Strong_20_Emphasis">correto</text:span> mas horroroso. Cada fechamento precisa de verificação de nulo — porque qualquer dos três pode ter falhado antes de ser atribuído. Cada fechamento precisa do seu próprio <text:span text:style-name="Source_20_Text">try/catch</text:span> — porque <text:span text:style-name="Source_20_Text">close()</text:span> pode lançar exceção, e uma exceção no fechamento do <text:span text:style-name="Source_20_Text">ResultSet</text:span> não deve impedir o fechamento do <text:span text:style-name="Source_20_Text">Statement</text:span> e da <text:span text:style-name="Source_20_Text">Connection</text:span>. A ordem de fechamento importa — você fecha de dentro para fora: <text:span text:style-name="Source_20_Text">ResultSet</text:span> primeiro, depois <text:span text:style-name="Source_20_Text">Statement</text:span>, depois <text:span text:style-name="Source_20_Text">Connection</text:span>.</text:p>
      <text:p text:style-name="Text_20_body">Projetos reais de JDBC puro dos anos 2000 tinham esse padrão repetido dezenas de vezes, com riscos de vazamento em cada lugar onde um desenvolvedor menos cuidadoso simplificava o bloco <text:span text:style-name="Source_20_Text">finally</text:span>.</text:p>
      <text:p text:style-name="Horizontal_20_Line"/>
      <text:h text:style-name="Heading_20_2" text:outline-level="2">6. try-with-resources — a solução do Java 7</text:h>
      <text:p text:style-name="Text_20_body">O Java 7 introduziu o <text:span text:style-name="Source_20_Text">try-with-resources</text:span> como mecanismo para recursos que implementam a interface <text:span text:style-name="Source_20_Text">AutoCloseable</text:span>. Qualquer classe que implementa <text:span text:style-name="Source_20_Text">AutoCloseable</text:span> — com o método <text:span text:style-name="Source_20_Text">close()</text:span> — pode ser declarada no cabeçalho de um bloco <text:span text:style-name="Source_20_Text">try</text:span> e será fechada <text:span text:style-name="Strong_20_Emphasis">automaticamente</text:span> quando o bloco terminar, seja por caminho normal ou por exceção.</text:p>
      <text:p text:style-name="Text_20_body"><text:span text:style-name="Source_20_Text">Connection</text:span>, <text:span text:style-name="Source_20_Text">PreparedStatement</text:span> e <text:span text:style-name="Source_20_Text">ResultSet</text:span> implementam <text:span text:style-name="Source_20_Text">AutoCloseable</text:span>. Portanto:</text:p>
      <text:p text:style-name="Preformatted_20_Text"><text:span text:style-name="Source_20_Text">try (Connection conn = DriverManager.getConnection(url, user, password);</text:span></text:p>
      <text:p text:style-name="Preformatted_20_Text"><text:span text:style-name="Source_20_Text"><text:s text:c="5"/>PreparedStatement stmt = conn.prepareStatement("SELECT * FROM produtos");</text:span></text:p>
      <text:p text:style-name="Preformatted_20_Text"><text:span text:style-name="Source_20_Text"><text:s text:c="5"/>ResultSet rs = stmt.executeQuery()) {</text:span></text:p>
      <text:p text:style-name="Preformatted_20_Text"/>
      <text:p text:style-name="Preformatted_20_Text"><text:span text:style-name="Source_20_Text"><text:s text:c="4"/>while (rs.next()) {</text:span></text:p>
      <text:p text:style-name="Preformatted_20_Text"><text:span text:style-name="Source_20_Text"><text:s text:c="8"/>// processar resultado</text:span></text:p>
      <text:p text:style-name="Preformatted_20_Text"><text:span text:style-name="Source_20_Text"><text:s text:c="4"/>}</text:span></text:p>
      <text:p text:style-name="Preformatted_20_Text"/>
      <text:p text:style-name="Preformatted_20_Text"><text:span text:style-name="Source_20_Text">} catch (SQLException e) {</text:span></text:p>
      <text:p text:style-name="Preformatted_20_Text"><text:span text:style-name="Source_20_Text"><text:s text:c="4"/>// tratar erro</text:span></text:p>
      <text:p text:style-name="P1"><text:span text:style-name="Source_20_Text">}</text:span></text:p>
      <text:p text:style-name="Text_20_body">O compilador transforma isso exatamente no padrão <text:span text:style-name="Source_20_Text">try/finally</text:span> que você viu acima — com todas as verificações de nulo, os <text:span text:style-name="Source_20_Text">try/catch</text:span> aninhados nos fechamentos e a ordem correta. Você ganha segurança total sem escrever nenhum código de fechamento manual.</text:p>
      <text:p text:style-name="Text_20_body">Três detalhes importantes que a maioria dos tutoriais não explica:</text:p>
      <text:p text:style-name="Text_20_body"><text:soft-page-break/><text:span text:style-name="Strong_20_Emphasis">Ordem de fechamento é inversa à ordem de declaração.</text:span> Se você declara <text:span text:style-name="Source_20_Text">conn</text:span>, depois <text:span text:style-name="Source_20_Text">stmt</text:span>, depois <text:span text:style-name="Source_20_Text">rs</text:span> — o Java fecha <text:span text:style-name="Source_20_Text">rs</text:span> primeiro, depois <text:span text:style-name="Source_20_Text">stmt</text:span>, depois <text:span text:style-name="Source_20_Text">conn</text:span>. Isso é correto e automático — exatamente a ordem que o padrão <text:span text:style-name="Source_20_Text">try/finally</text:span> manual exigia.</text:p>
      <text:p text:style-name="Text_20_body"><text:span text:style-name="Strong_20_Emphasis">Exceções suprimidas.</text:span> Se o bloco <text:span text:style-name="Source_20_Text">try</text:span> lança uma exceção E o fechamento automático também lança uma exceção, a exceção do fechamento é <text:span text:style-name="Strong_20_Emphasis">suprimida</text:span> — adicionada como suprimida à exceção principal, não a descarta nem a mascara. Você pode acessá-la via <text:span text:style-name="Source_20_Text">e.getSuppressed()</text:span>. Isso é um comportamento muito mais correto do que o padrão manual, onde uma exceção no <text:span text:style-name="Source_20_Text">finally</text:span> podia mascarar a exceção original.</text:p>
      <text:p text:style-name="Text_20_body"><text:span text:style-name="Strong_20_Emphasis">Recursos declarados fora do try não são fechados automaticamente.</text:span> Se por algum motivo você declara a <text:span text:style-name="Source_20_Text">Connection</text:span> fora do <text:span text:style-name="Source_20_Text">try-with-resources</text:span> e a passa como parâmetro para um método, o fechamento automático não se aplica. O recurso precisa estar declarado <text:span text:style-name="Strong_20_Emphasis">dentro</text:span> dos parênteses do <text:span text:style-name="Source_20_Text">try</text:span> para receber o tratamento automático.</text:p>
      <text:p text:style-name="Horizontal_20_Line"/>
      <text:h text:style-name="Heading_20_2" text:outline-level="2">7. A classe ConnectionFactory</text:h>
      <text:p text:style-name="Text_20_body">O cronograma prevê uma <text:span text:style-name="Source_20_Text">ConnectionFactory</text:span> como o lugar central para criação de conexões. Essa centralização tem um motivo arquitetural importante: <text:span text:style-name="Strong_20_Emphasis">evitar que as credenciais e a URL de conexão se espalhem pelo código</text:span>.</text:p>
      <text:p text:style-name="Text_20_body">Se cada <text:span text:style-name="Source_20_Text">DAO</text:span> chamar <text:span text:style-name="Source_20_Text">DriverManager.getConnection(url, user, password)</text:span> diretamente, você tem a URL e as credenciais duplicadas em múltiplos lugares. Quando precisar mudar — trocar de banco, mudar de senha, mover para outro servidor — você muda em todos esses lugares e espera não esquecer nenhum.</text:p>
      <text:p text:style-name="Text_20_body">Com <text:span text:style-name="Source_20_Text">ConnectionFactory</text:span>, há um único lugar no código que conhece os detalhes de conexão. Todos os DAOs pedem uma conexão para essa classe sem saber como ela é criada. Isso é o princípio de <text:span text:style-name="Strong_20_Emphasis">encapsulamento</text:span> aplicado à infraestrutura.</text:p>
      <text:p text:style-name="Text_20_body">A estrutura que você vai construir na prática:</text:p>
      <text:p text:style-name="Preformatted_20_Text"><text:span text:style-name="Source_20_Text">package br.com.raimundo.estoque.connection;</text:span></text:p>
      <text:p text:style-name="Preformatted_20_Text"/>
      <text:p text:style-name="Preformatted_20_Text"><text:span text:style-name="Source_20_Text">import java.sql.Connection;</text:span></text:p>
      <text:p text:style-name="Preformatted_20_Text"><text:span text:style-name="Source_20_Text">import java.sql.DriverManager;</text:span></text:p>
      <text:p text:style-name="Preformatted_20_Text"><text:span text:style-name="Source_20_Text">import java.sql.SQLException;</text:span></text:p>
      <text:p text:style-name="Preformatted_20_Text"/>
      <text:p text:style-name="Preformatted_20_Text"><text:span text:style-name="Source_20_Text">public class ConnectionFactory {</text:span></text:p>
      <text:p text:style-name="Preformatted_20_Text"/>
      <text:p text:style-name="Preformatted_20_Text"><text:span text:style-name="Source_20_Text"><text:s text:c="4"/>private static final String URL <text:s text:c="5"/>= "jdbc:postgresql://localhost:5432/estoque";</text:span></text:p>
      <text:p text:style-name="Preformatted_20_Text"><text:span text:style-name="Source_20_Text"><text:s text:c="4"/>private static final String USUARIO <text:s/>= "postgres";</text:span></text:p>
      <text:p text:style-name="Preformatted_20_Text"><text:span text:style-name="Source_20_Text"><text:s text:c="4"/>private static final String SENHA <text:s text:c="3"/>= "sua_senha";</text:span></text:p>
      <text:p text:style-name="Preformatted_20_Text"/>
      <text:p text:style-name="Preformatted_20_Text"><text:span text:style-name="Source_20_Text"><text:s text:c="4"/>public static Connection getConnection() throws SQLException {</text:span></text:p>
      <text:p text:style-name="Preformatted_20_Text"><text:span text:style-name="Source_20_Text"><text:s text:c="8"/>return DriverManager.getConnection(URL, USUARIO, SENHA);</text:span></text:p>
      <text:p text:style-name="Preformatted_20_Text"><text:span text:style-name="Source_20_Text"><text:s text:c="4"/>}</text:span></text:p>
      <text:p text:style-name="P1"><text:span text:style-name="Source_20_Text">}</text:span></text:p>
      <text:p text:style-name="Text_20_body">Um ponto que vai aparecer mais tarde: em projetos reais, URL, usuário e senha <text:span text:style-name="Strong_20_Emphasis">nunca ficam hardcoded no código-fonte</text:span>. Eles vêm de variáveis de ambiente ou arquivos de configuração <text:soft-page-break/>externos ao repositório. Isso é um tópico de segurança que o seu cronograma identificou como gap — você vai ver isso formalmente no Spring Boot, mas vale saber desde agora que credenciais no código é uma vulnerabilidade séria.</text:p>
      <text:p text:style-name="Horizontal_20_Line"/>
      <text:h text:style-name="Heading_20_2" text:outline-level="2">8. Connection pooling — o conceito que está por baixo</text:h>
      <text:p text:style-name="Text_20_body">O cronograma não cobre connection pooling neste módulo, mas você precisa entender o conceito agora — porque ele explica uma limitação importante do que você está fazendo.</text:p>
      <text:p text:style-name="Text_20_body">O <text:span text:style-name="Source_20_Text">DriverManager.getConnection()</text:span> cria uma <text:span text:style-name="Strong_20_Emphasis">nova conexão física</text:span> a cada chamada. Em desenvolvimento, com poucos acessos, isso não é problema. Em produção, com múltiplos usuários simultâneos, criar e destruir conexões TCP constantemente seria caríssimo — o custo de autenticação e handshake de rede aconteceria em cada operação.</text:p>
      <text:p text:style-name="Text_20_body">A solução é um <text:span text:style-name="Strong_20_Emphasis">pool de conexões</text:span> — um componente que mantém um conjunto de conexões abertas prontas para uso. Quando um DAO pede uma conexão, o pool entrega uma já aberta. Quando o DAO "fecha" a conexão — chama <text:span text:style-name="Source_20_Text">close()</text:span> — o pool não fecha a conexão física; ele a devolve para o pool para ser reutilizada pela próxima operação.</text:p>
      <text:p text:style-name="Text_20_body">O pool mais usado no ecossistema Spring Boot é o <text:span text:style-name="Strong_20_Emphasis">HikariCP</text:span> — que é exatamente o que o Spring Boot configura automaticamente quando você adiciona uma dependência de banco. Quando você chegar no Spring Boot, <text:span text:style-name="Source_20_Text">ConnectionFactory</text:span> desaparece do seu código — o framework gerencia o pool inteiramente. Por isso a <text:span text:style-name="Source_20_Text">ConnectionFactory</text:span> que você vai construir agora é uma solução educacional e de projetos pequenos, não o padrão de produção.</text:p>
      <text:p text:style-name="Text_20_body">Essa visão é importante: o que você está aprendendo agora é "JDBC na unha" — a camada mais baixa, exposta, manual. Frameworks como Spring abstraem e melhoram tudo isso. Mas você só vai entender o que o framework está fazendo por você quando tiver construído o equivalente manual uma vez.</text:p>
      <text:p text:style-name="Horizontal_20_Line"/>
      <text:h text:style-name="Heading_20_2" text:outline-level="2">9. Possíveis erros e o que significam</text:h>
      <text:p text:style-name="Text_20_body">Quando você for para a prática, os erros mais comuns na primeira conexão têm causas específicas:</text:p>
      <text:p text:style-name="Text_20_body"><text:span text:style-name="Strong_20_Emphasis"><text:span text:style-name="Source_20_Text">Connection refused</text:span></text:span> — o PostgreSQL não está rodando, ou está rodando numa porta diferente da que você especificou na URL.</text:p>
      <text:p text:style-name="Text_20_body"><text:span text:style-name="Strong_20_Emphasis"><text:span text:style-name="Source_20_Text">FATAL: password authentication failed</text:span></text:span> — usuário ou senha incorretos.</text:p>
      <text:p text:style-name="Text_20_body"><text:span text:style-name="Strong_20_Emphasis"><text:span text:style-name="Source_20_Text">FATAL: database "estoque" does not exist</text:span></text:span> — o banco com esse nome não foi criado ainda. Você precisa criá-lo antes de conectar.</text:p>
      <text:p text:style-name="Text_20_body"><text:span text:style-name="Strong_20_Emphasis"><text:span text:style-name="Source_20_Text">No suitable driver found for jdbc:postgresql://...</text:span></text:span> — o <text:span text:style-name="Source_20_Text">.jar</text:span> do driver não está no classpath. Verifique a dependência no <text:span text:style-name="Source_20_Text">pom.xml</text:span> e se o Maven baixou o arquivo corretamente em <text:span text:style-name="Source_20_Text">~/.m2</text:span>.</text:p>
      <text:p text:style-name="Text_20_body"><text:span text:style-name="Strong_20_Emphasis"><text:span text:style-name="Source_20_Text">Connection timed out</text:span></text:span> — o PostgreSQL está rodando mas não está acessível no endereço especificado — pode ser firewall, endereço errado ou o banco está em outra máquina.</text:p>
      <text:p text:style-name="Text_20_body"><text:soft-page-break/>Cada mensagem de erro do JDBC é precisa e informativa. A prática de ler a mensagem com atenção — não apenas "deu erro" — é um hábito que diferencia quem resolve problemas de quem fica preso.</text:p>
      <text:p text:style-name="Horizontal_20_Line"/>
      <text:h text:style-name="Heading_20_2" text:outline-level="2">Síntese da aula</text:h>
      <text:p text:style-name="Text_20_body">A URL JDBC encapsula três informações: qual driver usar, onde está o banco e qual banco acessar. O <text:span text:style-name="Source_20_Text">DriverManager</text:span> encontra o driver correto via SPI — registro automático pelo classpath — sem necessidade de <text:span text:style-name="Source_20_Text">Class.forName</text:span>.</text:p>
      <text:p text:style-name="Text_20_body"><text:span text:style-name="Source_20_Text">Connection</text:span> representa uma sessão com custo real de criação — um socket TCP, autenticação e alocação de recursos no servidor. Não fechar conexões corretamente causa vazamento de recursos que se manifesta como falha no banco, não no código que causou o problema.</text:p>
      <text:p text:style-name="Text_20_body"><text:span text:style-name="Source_20_Text">try-with-resources</text:span> resolve esse problema elegantemente para qualquer classe que implemente <text:span text:style-name="Source_20_Text">AutoCloseable</text:span> — fecha os recursos na ordem inversa da declaração, trata exceções suprimidas corretamente e elimina o código <text:span text:style-name="Source_20_Text">try/finally</text:span> manual propenso a bugs. É o padrão não-negociável no JDBC moderno.</text:p>
      <text:p text:style-name="Text_20_body"><text:span text:style-name="Source_20_Text">ConnectionFactory</text:span> centraliza credenciais e URL de conexão — em projetos reais, essas informações nunca ficam hardcoded no código. Connection pooling — que você verá formalmente no Spring Boot com HikariCP — resolve o custo de criação de conexões em produção, algo que o <text:span text:style-name="Source_20_Text">DriverManager</text:span> puro não oferece.</text:p>
      <text:p text:style-name="Text_20_body">Amanhã o cronograma trabalha a estrutura da tabela <text:span text:style-name="Source_20_Text">produtos</text:span> e inserção manual de dados — teoria mais leve, mas vou aprofundar os tipos SQL e sua correspondência exata com tipos Java, que é onde surgem bugs sutis no mapeamento do <text:span text:style-name="Source_20_Text">ResultSet</text:span> mais à frente.</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ne_20_numbering" style:display-name="Line numbering"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22T21:50:44.114059500</meta:creation-date>
    <dc:date>2026-06-22T21:52:29.589337600</dc:date>
    <meta:editing-duration>PT1M46S</meta:editing-duration>
    <meta:editing-cycles>1</meta:editing-cycles>
    <meta:document-statistic meta:table-count="0" meta:image-count="0" meta:object-count="0" meta:page-count="14" meta:paragraph-count="283" meta:word-count="4526" meta:character-count="29981" meta:non-whitespace-character-count="25021"/>
    <meta:generator>LibreOffice/25.8.7.3$Windows_X86_64 LibreOffice_project/30742500f2d3eb4366ac312fa33d3dcabdb3eba5</meta:generator>
  </office:meta>
</office:document-meta>
</file>