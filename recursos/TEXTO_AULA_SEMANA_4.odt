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— Semana 4, Segunda-feira</text:h>
      <text:h text:style-name="Heading_20_2" text:outline-level="2">Java e Banco de Dados — A Ponte que Está Por Vir</text:h>
      <text:p text:style-name="Horizontal_20_Line"/>
      <text:h text:style-name="Heading_20_2" text:outline-level="2">1. O que esta semana representa</text:h>
      <text:p text:style-name="Text_20_body">Você passou três semanas construindo dois mundos separados. No mundo Java, tem um projeto Maven organizado em pacotes com classes <text:span text:style-name="Source_20_Text">Cliente</text:span>, <text:span text:style-name="Source_20_Text">Produto</text:span> e <text:span text:style-name="Source_20_Text">Pedido</text:span>. No mundo do banco, tem tabelas relacionais com dados reais, constraints de integridade e queries funcionais.</text:p>
      <text:p text:style-name="Text_20_body">Esses dois mundos ainda não conversam. Seus objetos Java vivem em memória — <text:span text:style-name="Source_20_Text">ArrayList</text:span>, atribuições diretas. Seu banco vive no PostgreSQL — completamente isolado do código Java.</text:p>
      <text:p text:style-name="Text_20_body">A Semana 4 não conecta esses dois mundos ainda — isso é o Módulo 5. O que ela faz é preparar essa conexão com precisão: alinhar os dois mundos conceitualmente, organizar o que foi construído, e dar a você uma visão clara do que vem a seguir. É a semana de fechamento e transição.</text:p>
      <text:p text:style-name="Horizontal_20_Line"/>
      <text:h text:style-name="Heading_20_2" text:outline-level="2">2. Como Java vai conversar com o banco</text:h>
      <text:p text:style-name="Text_20_body">Antes de alinhar classes e tabelas, você precisa entender o mecanismo que vai fazer a comunicação acontecer — porque ele influencia como você pensa sobre a relação entre objetos e tabelas.</text:p>
      <text:p text:style-name="Text_20_body">A pilha de tecnologias que conecta Java a bancos de dados tem três camadas que você vai percorrer ao longo dos próximos módulos.</text:p>
      <text:p text:style-name="Text_20_body"><text:span text:style-name="Strong_20_Emphasis">JDBC — Java Database Connectivity.</text:span> É a camada mais baixa. Uma API padrão do próprio Java — pacote <text:span text:style-name="Source_20_Text">java.sql</text:span> — que define interfaces para abrir conexões, enviar SQL e receber resultados. O JDBC não sabe nada sobre PostgreSQL especificamente — ele define contratos genéricos. O driver do PostgreSQL é quem implementa esses contratos para aquele banco específico. É por isso que trocar de banco de dados exige trocar o driver, não reescrever o código de acesso a dados — desde que você use apenas as interfaces padrão do JDBC.</text:p>
      <text:p text:style-name="Text_20_body"><text:span text:style-name="Strong_20_Emphasis">JPA/Hibernate — Java Persistence API.</text:span> É a camada do meio. JPA é uma especificação que define como objetos Java se mapeiam para tabelas relacionais. Hibernate é a implementação mais usada dessa especificação. Com JPA você anota suas classes com <text:span text:style-name="Source_20_Text">@Entity</text:span>, <text:span text:style-name="Source_20_Text">@Column</text:span>, <text:span text:style-name="Source_20_Text">@OneToMany</text:span> e o framework gera e executa o SQL por baixo — você raramente escreve SQL manualmente. JPA vive sobre o JDBC — no fundo, toda operação JPA vira JDBC antes de chegar no banco.</text:p>
      <text:p text:style-name="Text_20_body"><text:span text:style-name="Strong_20_Emphasis">Spring Data JPA.</text:span> É a camada mais alta. Vive sobre JPA e elimina ainda mais código boilerplate. Você define uma interface que estende <text:span text:style-name="Source_20_Text">JpaRepository</text:span>, declara métodos com nomes como <text:span text:style-name="Source_20_Text">findByEmail</text:span> ou <text:span text:style-name="Source_20_Text">findByNomeContaining</text:span>, e o Spring gera a implementação automaticamente. Em muitos casos você não escreve nem SQL nem código de repositório — apenas a assinatura do método.</text:p>
      <text:p text:style-name="Text_20_body"><text:soft-page-break/>A progressão é: Módulo 5 → JDBC puro. Módulo 6 → JPA/Hibernate. Módulos seguintes → Spring Data JPA. Você está construindo de baixo para cima — entendendo cada camada antes de usar a abstração que a esconde.</text:p>
      <text:p text:style-name="Horizontal_20_Line"/>
      <text:h text:style-name="Heading_20_2" text:outline-level="2">3. Por que aprender JDBC se JPA existe</text:h>
      <text:p text:style-name="Text_20_body">Essa é uma pergunta legítima que todo iniciante faz. A resposta tem duas dimensões.</text:p>
      <text:p text:style-name="Text_20_body"><text:span text:style-name="Strong_20_Emphasis">Diagnóstico.</text:span> Quando uma aplicação Spring Data JPA tem um problema de performance — uma query lenta, N+1 queries, resultado inesperado — você precisa olhar o SQL que está sendo gerado e entender o que está acontecendo na camada JDBC. Se você nunca entendeu JDBC, está cego nesse diagnóstico. Desenvolvedores que pulam JDBC e vão direto para Spring Data JPA frequentemente criam problemas de performance que não conseguem nem identificar, muito menos resolver.</text:p>
      <text:p text:style-name="Text_20_body"><text:span text:style-name="Strong_20_Emphasis">Fundação intelectual.</text:span> JPA faz escolhas de design que só fazem sentido se você entende o problema que ela resolve. O conceito de <text:span text:style-name="Source_20_Text">EntityManager</text:span>, de contexto de persistência, de lazy vs eager loading, de transações gerenciadas — tudo isso tem raízes no que o JDBC expõe diretamente. Aprender JPA sem JDBC é aprender a usar uma ferramenta sem entender o problema que ela resolve.</text:p>
      <text:p text:style-name="Horizontal_20_Line"/>
      <text:h text:style-name="Heading_20_2" text:outline-level="2">4. A diferença entre modelagem Java e modelagem relacional</text:h>
      <text:p text:style-name="Text_20_body">Esse é o ponto conceitual mais importante da aula — e uma das tensões fundamentais do desenvolvimento backend Java.</text:p>
      <text:p text:style-name="Text_20_body">Java é orientado a objetos. O banco de dados é relacional. Esses dois paradigmas têm formas diferentes de representar os mesmos conceitos, e as diferenças criam atritos que você vai encontrar repetidamente.</text:p>
      <text:p text:style-name="Text_20_body"><text:span text:style-name="Strong_20_Emphasis">Herança.</text:span> Java tem herança de classes — <text:span text:style-name="Source_20_Text">PessoaFisica extends Cliente</text:span>. Bancos relacionais não têm herança nativa. JPA oferece três estratégias para mapear herança em tabelas, cada uma com trade-offs. JDBC não oferece nada — você resolve manualmente.</text:p>
      <text:p text:style-name="Text_20_body"><text:span text:style-name="Strong_20_Emphasis">Identidade.</text:span> Em Java, dois objetos são o mesmo se <text:span text:style-name="Source_20_Text">==</text:span> retorna true — mesma referência em memória. Em banco, dois registros são o mesmo se têm a mesma PK. JPA gerencia essa correspondência com o conceito de contexto de persistência — um cache de primeira nível que garante que dois <text:span text:style-name="Source_20_Text">find</text:span> pelo mesmo ID retornam o mesmo objeto Java.</text:p>
      <text:p text:style-name="Text_20_body"><text:span text:style-name="Strong_20_Emphasis">Relacionamentos.</text:span> Em Java, <text:span text:style-name="Source_20_Text">Pedido</text:span> tem um atributo <text:span text:style-name="Source_20_Text">cliente</text:span> do tipo <text:span text:style-name="Source_20_Text">Cliente</text:span> — uma referência direta ao objeto. Em banco, <text:span text:style-name="Source_20_Text">pedidos</text:span> tem uma coluna <text:span text:style-name="Source_20_Text">cliente_id</text:span> com um inteiro. A passagem de referência de objeto para chave estrangeira — e de volta — é o que JPA faz automaticamente com anotações como <text:span text:style-name="Source_20_Text">@ManyToOne</text:span> e <text:span text:style-name="Source_20_Text">@OneToMany</text:span>.</text:p>
      <text:p text:style-name="Text_20_body"><text:span text:style-name="Strong_20_Emphasis">Coleções.</text:span> Em Java, <text:span text:style-name="Source_20_Text">Cliente</text:span> pode ter um atributo <text:span text:style-name="Source_20_Text">List&lt;Pedido&gt;</text:span>. Em banco não existe coluna que armazena listas — existe a tabela <text:span text:style-name="Source_20_Text">pedidos</text:span> com <text:span text:style-name="Source_20_Text">cliente_id</text:span>. Mapear <text:span text:style-name="Source_20_Text">List&lt;Pedido&gt;</text:span> para linhas em <text:span text:style-name="Source_20_Text">pedidos</text:span> é outra responsabilidade do JPA.</text:p>
      <text:p text:style-name="Text_20_body"><text:soft-page-break/>Essa diferença entre os dois paradigmas tem nome: <text:span text:style-name="Strong_20_Emphasis">impedância objeto-relacional</text:span> — e é por isso que ferramentas como JPA existem. Elas são pontes entre dois modelos fundamentalmente diferentes de representar dados.</text:p>
      <text:p text:style-name="Horizontal_20_Line"/>
      <text:h text:style-name="Heading_20_2" text:outline-level="2">5. Alinhando as classes Java com as tabelas</text:h>
      <text:p text:style-name="Text_20_body">Agora o exercício concreto: comparar o que você tem nas classes com o que você tem no banco, e identificar inconsistências.</text:p>
      <text:p text:style-name="Text_20_body"><text:span text:style-name="Strong_20_Emphasis"><text:span text:style-name="Source_20_Text">Cliente</text:span></text:span></text:p>
      <text:p text:style-name="Preformatted_20_Text"><text:span text:style-name="Source_20_Text">// O que você provavelmente tem na classe</text:span></text:p>
      <text:p text:style-name="Preformatted_20_Text"><text:span text:style-name="Source_20_Text">public class Cliente {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String nome;</text:span></text:p>
      <text:p text:style-name="Preformatted_20_Text"><text:span text:style-name="Source_20_Text"><text:s text:c="4"/>private String email;</text:span></text:p>
      <text:p text:style-name="P1"><text:span text:style-name="Source_20_Text">}</text:span></text:p>
      <text:p text:style-name="Preformatted_20_Text"><text:span text:style-name="Source_20_Text">-- O que está no banco</text:span></text:p>
      <text:p text:style-name="Preformatted_20_Text"><text:span text:style-name="Source_20_Text">CREATE TABLE clientes (</text:span></text:p>
      <text:p text:style-name="Preformatted_20_Text"><text:span text:style-name="Source_20_Text"><text:s text:c="4"/>id <text:s text:c="3"/>SERIAL PRIMARY KEY,</text:span></text:p>
      <text:p text:style-name="Preformatted_20_Text"><text:span text:style-name="Source_20_Text"><text:s text:c="4"/>nome <text:s/>VARCHAR(100) NOT NULL,</text:span></text:p>
      <text:p text:style-name="Preformatted_20_Text"><text:span text:style-name="Source_20_Text"><text:s text:c="4"/>email VARCHAR(150) NOT NULL UNIQUE,</text:span></text:p>
      <text:p text:style-name="Preformatted_20_Text"><text:span text:style-name="Source_20_Text"><text:s text:c="4"/>cpf <text:s text:c="2"/>CHAR(11)</text:span></text:p>
      <text:p text:style-name="P1"><text:span text:style-name="Source_20_Text">);</text:span></text:p>
      <text:p text:style-name="Text_20_body">Se você adicionou <text:span text:style-name="Source_20_Text">cpf</text:span> na tabela mas não na classe, há uma inconsistência. O banco aceita CPF — a classe não o representa. Quando você conectar via JDBC, vai precisar decidir: mapeia o CPF na classe ou ignora a coluna?</text:p>
      <text:p text:style-name="Text_20_body"><text:span text:style-name="Strong_20_Emphasis"><text:span text:style-name="Source_20_Text">Produto</text:span></text:span></text:p>
      <text:p text:style-name="Preformatted_20_Text"><text:span text:style-name="Source_20_Text">public class Produto {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String nome;</text:span></text:p>
      <text:p text:style-name="Preformatted_20_Text"><text:span text:style-name="Source_20_Text"><text:s text:c="4"/>private double preco; <text:s text:c="3"/>// ← problema aqui</text:span></text:p>
      <text:p text:style-name="Preformatted_20_Text"><text:span text:style-name="Source_20_Text"><text:s text:c="4"/>private int estoque;</text:span></text:p>
      <text:p text:style-name="P1"><text:span text:style-name="Source_20_Text">}</text:span></text:p>
      <text:p text:style-name="Preformatted_20_Text"><text:span text:style-name="Source_20_Text">CREATE TABLE produtos (</text:span></text:p>
      <text:p text:style-name="Preformatted_20_Text"><text:span text:style-name="Source_20_Text"><text:s text:c="4"/>id <text:s text:c="5"/>SERIAL PRIMARY KEY,</text:span></text:p>
      <text:p text:style-name="Preformatted_20_Text"><text:span text:style-name="Source_20_Text"><text:s text:c="4"/>nome <text:s text:c="3"/>VARCHAR(100) <text:s text:c="2"/>NOT NULL,</text:span></text:p>
      <text:p text:style-name="Preformatted_20_Text"><text:span text:style-name="Source_20_Text"><text:s text:c="4"/>preco <text:s text:c="2"/>DECIMAL(10, 2) NOT NULL,</text:span></text:p>
      <text:p text:style-name="Preformatted_20_Text"><text:span text:style-name="Source_20_Text"><text:s text:c="4"/>estoque INTEGER <text:s text:c="7"/>NOT NULL DEFAULT 0</text:span></text:p>
      <text:p text:style-name="P1"><text:span text:style-name="Source_20_Text">);</text:span></text:p>
      <text:p text:style-name="Text_20_body">O atributo <text:span text:style-name="Source_20_Text">preco</text:span> como <text:span text:style-name="Source_20_Text">double</text:span> em Java é um problema. A coluna <text:span text:style-name="Source_20_Text">DECIMAL(10,2)</text:span> no banco tem precisão exata. O tipo <text:span text:style-name="Source_20_Text">double</text:span> em Java tem precisão aproximada de ponto flutuante. Para valores monetários, o tipo correto em Java é <text:span text:style-name="Source_20_Text">BigDecimal</text:span> — que corresponde exatamente ao <text:span text:style-name="Source_20_Text">DECIMAL</text:span> do SQL:</text:p>
      <text:p text:style-name="Preformatted_20_Text"><text:span text:style-name="Source_20_Text">import java.math.BigDecimal;</text:span></text:p>
      <text:p text:style-name="Preformatted_20_Text"/>
      <text:p text:style-name="Preformatted_20_Text"><text:span text:style-name="Source_20_Text">public class Produto {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String nome;</text:span></text:p>
      <text:p text:style-name="Preformatted_20_Text"><text:soft-page-break/><text:span text:style-name="Source_20_Text"><text:s text:c="4"/>private BigDecimal preco; <text:s/>// correto</text:span></text:p>
      <text:p text:style-name="Preformatted_20_Text"><text:span text:style-name="Source_20_Text"><text:s text:c="4"/>private Integer estoque;</text:span></text:p>
      <text:p text:style-name="P1"><text:span text:style-name="Source_20_Text">}</text:span></text:p>
      <text:p text:style-name="Text_20_body"><text:span text:style-name="Strong_20_Emphasis"><text:span text:style-name="Source_20_Text">Pedido</text:span></text:span></text:p>
      <text:p text:style-name="Preformatted_20_Text"><text:span text:style-name="Source_20_Text">public class Pedido {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Cliente cliente; <text:s text:c="5"/>// referência ao objeto</text:span></text:p>
      <text:p text:style-name="Preformatted_20_Text"><text:span text:style-name="Source_20_Text"><text:s text:c="4"/>private List&lt;Produto&gt; produtos; // ← modelagem incompleta</text:span></text:p>
      <text:p text:style-name="P1"><text:span text:style-name="Source_20_Text">}</text:span></text:p>
      <text:p text:style-name="Preformatted_20_Text"><text:span text:style-name="Source_20_Text">CREATE TABLE pedidos (</text:span></text:p>
      <text:p text:style-name="Preformatted_20_Text"><text:span text:style-name="Source_20_Text"><text:s text:c="4"/>id <text:s text:c="8"/>SERIAL PRIMARY KEY,</text:span></text:p>
      <text:p text:style-name="Preformatted_20_Text"><text:span text:style-name="Source_20_Text"><text:s text:c="4"/>cliente_id INTEGER <text:s text:c="2"/>NOT NULL REFERENCES clientes(id),</text:span></text:p>
      <text:p text:style-name="Preformatted_20_Text"><text:span text:style-name="Source_20_Text"><text:s text:c="4"/>data <text:s text:c="6"/>TIMESTAMP NOT NULL DEFAULT NOW()</text:span></text:p>
      <text:p text:style-name="P1"><text:span text:style-name="Source_20_Text">);</text:span></text:p>
      <text:p text:style-name="Text_20_body">Dois pontos aqui.</text:p>
      <text:p text:style-name="Text_20_body">Primeiro: a classe tem <text:span text:style-name="Source_20_Text">List&lt;Produto&gt;</text:span> mas o banco tem <text:span text:style-name="Source_20_Text">itens_pedido</text:span> com quantidade e preço unitário. Uma lista de <text:span text:style-name="Source_20_Text">Produto</text:span> perde essas informações. O correto é ter uma classe <text:span text:style-name="Source_20_Text">ItemPedido</text:span> que representa a tabela <text:span text:style-name="Source_20_Text">itens_pedido</text:span>:</text:p>
      <text:p text:style-name="Preformatted_20_Text"><text:span text:style-name="Source_20_Text">public class ItemPedido {</text:span></text:p>
      <text:p text:style-name="Preformatted_20_Text"><text:span text:style-name="Source_20_Text"><text:s text:c="4"/>private Pedido pedido;</text:span></text:p>
      <text:p text:style-name="Preformatted_20_Text"><text:span text:style-name="Source_20_Text"><text:s text:c="4"/>private Produto produto;</text:span></text:p>
      <text:p text:style-name="Preformatted_20_Text"><text:span text:style-name="Source_20_Text"><text:s text:c="4"/>private Integer quantidade;</text:span></text:p>
      <text:p text:style-name="Preformatted_20_Text"><text:span text:style-name="Source_20_Text"><text:s text:c="4"/>private BigDecimal precoUnit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edido {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Cliente cliente;</text:span></text:p>
      <text:p text:style-name="Preformatted_20_Text"><text:span text:style-name="Source_20_Text"><text:s text:c="4"/>private LocalDateTime data;</text:span></text:p>
      <text:p text:style-name="Preformatted_20_Text"><text:span text:style-name="Source_20_Text"><text:s text:c="4"/>private List&lt;ItemPedido&gt; itens; <text:s/>// correto</text:span></text:p>
      <text:p text:style-name="P1"><text:span text:style-name="Source_20_Text">}</text:span></text:p>
      <text:p text:style-name="Text_20_body">Segundo: a coluna <text:span text:style-name="Source_20_Text">data</text:span> existe no banco mas provavelmente não existe na classe. O tipo Java correspondente a <text:span text:style-name="Source_20_Text">TIMESTAMP</text:span> é <text:span text:style-name="Source_20_Text">LocalDateTime</text:span> — do pacote <text:span text:style-name="Source_20_Text">java.time</text:span>, introduzido no Java 8 e que é o padrão moderno para datas e horas em Java.</text:p>
      <text:p text:style-name="Horizontal_20_Line"/>
      <text:h text:style-name="Heading_20_2" text:outline-level="2">6. A visão geral do que vem no JDBC</text:h>
      <text:p text:style-name="Text_20_body">No Módulo 5 você vai trabalhar com quatro conceitos centrais do JDBC que valem introduzir agora.</text:p>
      <text:p text:style-name="Text_20_body"><text:span text:style-name="Strong_20_Emphasis"><text:span text:style-name="Source_20_Text">Connection</text:span></text:span> representa uma conexão aberta com o banco. É cara de criar — abre um socket de rede, autentica, estabelece a sessão. Por isso em aplicações reais você usa um <text:span text:style-name="Strong_20_Emphasis">pool de conexões</text:span> — um conjunto de conexões abertas que ficam disponíveis para reuso. O HikariCP é o pool padrão do Spring Boot.</text:p>
      <text:p text:style-name="Text_20_body"><text:span text:style-name="Strong_20_Emphasis"><text:span text:style-name="Source_20_Text">PreparedStatement</text:span></text:span> é a forma correta de enviar SQL com parâmetros ao banco. Em vez de concatenar strings — o que abre vulnerabilidade de SQL Injection — você usa placeholders:</text:p>
      <text:p text:style-name="Preformatted_20_Text"><text:soft-page-break/><text:span text:style-name="Source_20_Text">String sql = "SELECT * FROM clientes WHERE email = ?";</text:span></text:p>
      <text:p text:style-name="Preformatted_20_Text"><text:span text:style-name="Source_20_Text">PreparedStatement stmt = connection.prepareStatement(sql);</text:span></text:p>
      <text:p text:style-name="Preformatted_20_Text"><text:span text:style-name="Source_20_Text">stmt.setString(1, email); <text:s/>// substitui o primeiro ?</text:span></text:p>
      <text:p text:style-name="P1"><text:span text:style-name="Source_20_Text">ResultSet rs = stmt.executeQuery();</text:span></text:p>
      <text:p text:style-name="Text_20_body">O banco recebe o SQL com o placeholder e o valor separadamente — nunca como uma string concatenada. Isso elimina a possibilidade de SQL Injection porque o banco trata o valor como dado, nunca como código SQL.</text:p>
      <text:p text:style-name="Text_20_body"><text:span text:style-name="Strong_20_Emphasis"><text:span text:style-name="Source_20_Text">ResultSet</text:span></text:span> é o cursor que percorre os resultados de uma query. Você itera linha por linha chamando <text:span text:style-name="Source_20_Text">rs.next()</text:span> e extrai valores por nome de coluna ou posição.</text:p>
      <text:p text:style-name="Text_20_body"><text:span text:style-name="Strong_20_Emphasis"><text:span text:style-name="Source_20_Text">SQLException</text:span></text:span> é a exceção checked que o JDBC lança em qualquer erro de banco — conexão falhou, constraint violada, SQL inválido. No Módulo 5 você vai aprender a capturar e tratar essas exceções adequadamente.</text:p>
      <text:p text:style-name="Horizontal_20_Line"/>
      <text:h text:style-name="Heading_20_2" text:outline-level="2">7. O que muda na sua visão de modelagem depois do SQL</text:h>
      <text:p text:style-name="Text_20_body">Essa é a pergunta que o seu cronograma coloca para reflexão hoje — e merece uma resposta direta.</text:p>
      <text:p text:style-name="Text_20_body">Antes do SQL, você modelava em Java pensando em objetos: atributos, referências, coleções. A estrutura era ditada pela conveniência do código orientado a objetos.</text:p>
      <text:p text:style-name="Text_20_body">Depois do SQL, você modela pensando em dois níveis simultaneamente: como o dado vive no banco — normalizado, com tipos precisos, com constraints de integridade — e como ele é representado no código Java — com objetos, referências e coleções.</text:p>
      <text:p text:style-name="Text_20_body">Isso muda decisões concretas. Você não usa <text:span text:style-name="Source_20_Text">double</text:span> para dinheiro — usa <text:span text:style-name="Source_20_Text">BigDecimal</text:span>. Você não usa <text:span text:style-name="Source_20_Text">String</text:span> para datas — usa <text:span text:style-name="Source_20_Text">LocalDateTime</text:span>. Você não ignora a tabela de junção <text:span text:style-name="Source_20_Text">itens_pedido</text:span> — cria uma classe <text:span text:style-name="Source_20_Text">ItemPedido</text:span> que a representa. Você pensa no tipo da coluna no banco antes de escolher o tipo do atributo em Java.</text:p>
      <text:p text:style-name="Text_20_body">Essa consciência dual — objeto e relação ao mesmo tempo — é uma característica fundamental do desenvolvedor backend Java maduro. Frameworks como JPA automatizam a tradução entre os dois mundos, mas a responsabilidade de modelar bem em ambos continua sendo sua.</text:p>
      <text:p text:style-name="Horizontal_20_Line"/>
      <text:h text:style-name="Heading_20_2" text:outline-level="2">Síntese da aula</text:h>
      <text:p text:style-name="Text_20_body">A pilha Java-banco tem três camadas que você vai percorrer em ordem: JDBC como fundação de baixo nível, JPA/Hibernate como mapeamento objeto-relacional, e Spring Data JPA como abstração de alto nível. Entender JDBC antes de JPA não é burocracia — é o que permite diagnosticar problemas que as abstrações escondem.</text:p>
      <text:p text:style-name="Text_20_body">A impedância objeto-relacional é a tensão fundamental entre o paradigma de objetos do Java e o paradigma relacional do banco. Herança, identidade, relacionamentos e coleções se expressam de formas diferentes nos dois mundos — e JPA existe para fazer essa ponte.</text:p>
      <text:p text:style-name="Text_20_body">Alinhar classes Java com tabelas SQL revela decisões concretas: <text:span text:style-name="Source_20_Text">BigDecimal</text:span> para valores monetários, <text:span text:style-name="Source_20_Text">LocalDateTime</text:span> para timestamps, <text:span text:style-name="Source_20_Text">ItemPedido</text:span> como classe que representa a <text:soft-page-break/>tabela de junção. Essas decisões não são detalhes — são o reflexo de entender os dois mundos simultaneamente.</text:p>
      <text:p text:style-name="Text_20_body">Amanhã você organiza os scripts SQL em estrutura profissional e reflete sobre como código e banco coexistem num projeto bem estrutur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22:13:01.630279400</meta:creation-date>
    <dc:date>2026-06-15T22:14:17.253167400</dc:date>
    <meta:editing-duration>PT1M16S</meta:editing-duration>
    <meta:editing-cycles>1</meta:editing-cycles>
    <meta:document-statistic meta:table-count="0" meta:image-count="0" meta:object-count="0" meta:page-count="6" meta:paragraph-count="111" meta:word-count="1813" meta:character-count="11420" meta:non-whitespace-character-count="9484"/>
    <meta:generator>LibreOffice/25.8.6.2$Windows_X86_64 LibreOffice_project/b4b39682cd9868fa725bc664aff94278d315bd04</meta:generator>
  </office:meta>
</office:document-meta>
</file>